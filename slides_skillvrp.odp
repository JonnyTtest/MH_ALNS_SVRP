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6B8000003E8A3FC7F8F.png" manifest:media-type="image/png"/>
  <manifest:file-entry manifest:full-path="Pictures/100000010000076C000005009095CA5F.png" manifest:media-type="image/png"/>
  <manifest:file-entry manifest:full-path="Pictures/100000010000076C000003971B9EEDD0.png" manifest:media-type="image/png"/>
  <manifest:file-entry manifest:full-path="Pictures/1000000100000550000003480795CCCF.png" manifest:media-type="image/png"/>
  <manifest:file-entry manifest:full-path="Pictures/10000001000005A000000438EA86FD1F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/>
    <style:font-face style:name="Consolas" svg:font-family="Consolas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.026cm" svg:stroke-linecap="butt" draw:fill="solid" draw:fill-color="#0f766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 loext:shadow-blur="0.111cm" loext:decorative="false"/>
    </style:style>
    <style:style style:name="gr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4" style:family="graphic" style:parent-style-name="standard">
      <style:graphic-properties draw:stroke="none" svg:stroke-width="0.026cm" svg:stroke-linecap="butt" draw:fill="solid" draw:fill-color="#e4572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 loext:shadow-blur="0.111cm" loext:decorative="false"/>
    </style:style>
    <style:style style:name="gr5" style:family="graphic">
      <style:graphic-properties style:protect="size" loext:decorative="false"/>
    </style:style>
    <style:style style:name="gr6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7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8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9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0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1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2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4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5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6" style:family="graphic" style:parent-style-name="standard" style:list-style-name="L1">
      <style:graphic-properties draw:stroke="none" svg:stroke-width="0.026cm" svg:stroke-linecap="butt" draw:fill="solid" draw:fill-color="#0f766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 loext:shadow-blur="0.111cm" loext:decorative="false"/>
      <style:paragraph-properties style:writing-mode="lr-tb"/>
    </style:style>
    <style:style style:name="gr17" style:family="graphic" style:parent-style-name="standard">
      <style:graphic-properties draw:stroke="none" svg:stroke-width="0.026cm" svg:stroke-linecap="butt" draw:fill="solid" draw:fill-color="#6b7280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 loext:shadow-blur="0.111cm" loext:decorative="false"/>
    </style:style>
    <style:style style:name="gr18" style:family="graphic" style:parent-style-name="standard" style:list-style-name="L1">
      <style:graphic-properties draw:stroke="none" svg:stroke-width="0.026cm" svg:stroke-linecap="butt" draw:fill="solid" draw:fill-color="#1f2937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 loext:shadow-blur="0.111cm" loext:decorative="false"/>
      <style:paragraph-properties style:writing-mode="lr-tb"/>
    </style:style>
    <style:style style:name="gr19" style:family="graphic" style:parent-style-name="standard" style:list-style-name="L1">
      <style:graphic-properties draw:stroke="none" svg:stroke-width="0.026cm" svg:stroke-linecap="butt" draw:fill="solid" draw:fill-color="#1f2937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 loext:shadow-blur="0.111cm" loext:decorative="false"/>
      <style:paragraph-properties style:writing-mode="lr-tb"/>
    </style:style>
    <style:style style:name="gr20" style:family="graphic" style:parent-style-name="standard" style:list-style-name="L1">
      <style:graphic-properties draw:stroke="none" svg:stroke-width="0.026cm" svg:stroke-linecap="butt" draw:fill="solid" draw:fill-color="#1f2937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 loext:shadow-blur="0.111cm" loext:decorative="false"/>
      <style:paragraph-properties style:writing-mode="lr-tb"/>
    </style:style>
    <style:style style:name="gr21" style:family="graphic" style:parent-style-name="standard" style:list-style-name="L1">
      <style:graphic-properties draw:stroke="none" svg:stroke-width="0.026cm" svg:stroke-linecap="butt" draw:fill="solid" draw:fill-color="#e4572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 loext:shadow-blur="0.111cm" loext:decorative="false"/>
      <style:paragraph-properties style:writing-mode="lr-tb"/>
    </style:style>
    <style:style style:name="gr2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2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24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25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26" style:family="graphic" style:parent-style-name="standard" style:list-style-name="L6">
      <style:graphic-properties draw:stroke="solid" svg:stroke-width="0.026cm" svg:stroke-color="#6b7280" svg:stroke-linecap="butt" draw:fill="solid" draw:fill-color="#f3f4f6" draw:textarea-horizontal-align="justify" draw:textarea-vertical-align="middle" draw:auto-grow-height="false" draw:fit-to-size="false" style:shrink-to-fit="false" fo:min-height="0cm" fo:min-width="0cm" fo:padding-top="0.254cm" fo:padding-bottom="0.125cm" fo:padding-left="0.457cm" fo:padding-right="0.305cm" fo:wrap-option="wrap" draw:shadow="visible" draw:shadow-offset-x="0cm" draw:shadow-offset-y="0.064cm" draw:shadow-color="#000000" draw:shadow-opacity="35%" loext:shadow-blur="0.111cm" loext:decorative="false"/>
      <style:paragraph-properties style:writing-mode="lr-tb"/>
    </style:style>
    <style:style style:name="gr27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28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29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30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31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32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33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34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35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36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37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38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39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40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41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4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4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44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45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46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47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48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49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50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51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52" style:family="graphic" style:parent-style-name="standard" style:list-style-name="L1">
      <style:graphic-properties draw:stroke="none" svg:stroke-width="0.026cm" svg:stroke-linecap="butt" draw:fill="solid" draw:fill-color="#0f766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 loext:shadow-blur="0.111cm" loext:decorative="false"/>
      <style:paragraph-properties style:writing-mode="lr-tb"/>
    </style:style>
    <style:style style:name="gr5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54" style:family="graphic" style:parent-style-name="standard" style:list-style-name="L6">
      <style:graphic-properties draw:stroke="solid" svg:stroke-width="0.026cm" svg:stroke-color="#6b7280" svg:stroke-linecap="butt" draw:fill="solid" draw:fill-color="#f3f4f6" draw:textarea-horizontal-align="justify" draw:textarea-vertical-align="middle" draw:auto-grow-height="false" draw:fit-to-size="false" style:shrink-to-fit="false" fo:min-height="0cm" fo:min-width="0cm" fo:padding-top="0.254cm" fo:padding-bottom="0.125cm" fo:padding-left="0.457cm" fo:padding-right="0.305cm" fo:wrap-option="wrap" draw:shadow="visible" draw:shadow-offset-x="0cm" draw:shadow-offset-y="0.064cm" draw:shadow-color="#000000" draw:shadow-opacity="35%" loext:shadow-blur="0.111cm" loext:decorative="false"/>
      <style:paragraph-properties style:writing-mode="lr-tb"/>
    </style:style>
    <style:style style:name="gr55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56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57" style:family="graphic" style:parent-style-name="standard" style:list-style-name="L6">
      <style:graphic-properties draw:stroke="solid" svg:stroke-width="0.026cm" svg:stroke-color="#6b7280" svg:stroke-linecap="butt" draw:fill="solid" draw:fill-color="#f3f4f6" draw:textarea-horizontal-align="justify" draw:textarea-vertical-align="middle" draw:auto-grow-height="false" draw:fit-to-size="false" style:shrink-to-fit="false" fo:min-height="0cm" fo:min-width="0cm" fo:padding-top="0.254cm" fo:padding-bottom="0.125cm" fo:padding-left="0.457cm" fo:padding-right="0.305cm" fo:wrap-option="wrap" draw:shadow="visible" draw:shadow-offset-x="0cm" draw:shadow-offset-y="0.064cm" draw:shadow-color="#000000" draw:shadow-opacity="35%" loext:shadow-blur="0.111cm" loext:decorative="false"/>
      <style:paragraph-properties style:writing-mode="lr-tb"/>
    </style:style>
    <style:style style:name="gr58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59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60" style:family="graphic" style:parent-style-name="standard" style:list-style-name="L6">
      <style:graphic-properties draw:stroke="solid" svg:stroke-width="0.026cm" svg:stroke-color="#6b7280" svg:stroke-linecap="butt" draw:fill="solid" draw:fill-color="#f3f4f6" draw:textarea-horizontal-align="justify" draw:textarea-vertical-align="middle" draw:auto-grow-height="false" draw:fit-to-size="false" style:shrink-to-fit="false" fo:min-height="0cm" fo:min-width="0cm" fo:padding-top="0.254cm" fo:padding-bottom="0.125cm" fo:padding-left="0.457cm" fo:padding-right="0.305cm" fo:wrap-option="wrap" draw:shadow="visible" draw:shadow-offset-x="0cm" draw:shadow-offset-y="0.064cm" draw:shadow-color="#000000" draw:shadow-opacity="35%" loext:shadow-blur="0.111cm" loext:decorative="false"/>
      <style:paragraph-properties style:writing-mode="lr-tb"/>
    </style:style>
    <style:style style:name="gr61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6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63" style:family="graphic" style:parent-style-name="standard" style:list-style-name="L6">
      <style:graphic-properties draw:stroke="solid" svg:stroke-width="0.026cm" svg:stroke-color="#6b7280" svg:stroke-linecap="butt" draw:fill="solid" draw:fill-color="#f3f4f6" draw:textarea-horizontal-align="justify" draw:textarea-vertical-align="middle" draw:auto-grow-height="false" draw:fit-to-size="false" style:shrink-to-fit="false" fo:min-height="0cm" fo:min-width="0cm" fo:padding-top="0.254cm" fo:padding-bottom="0.125cm" fo:padding-left="0.457cm" fo:padding-right="0.305cm" fo:wrap-option="wrap" draw:shadow="visible" draw:shadow-offset-x="0cm" draw:shadow-offset-y="0.064cm" draw:shadow-color="#000000" draw:shadow-opacity="35%" loext:shadow-blur="0.111cm" loext:decorative="false"/>
      <style:paragraph-properties style:writing-mode="lr-tb"/>
    </style:style>
    <style:style style:name="gr64" style:family="graphic" style:parent-style-name="standard" style:list-style-name="L6">
      <style:graphic-properties draw:stroke="solid" svg:stroke-width="0.026cm" svg:stroke-color="#6b7280" svg:stroke-linecap="butt" draw:fill="solid" draw:fill-color="#f3f4f6" draw:textarea-horizontal-align="justify" draw:textarea-vertical-align="middle" draw:auto-grow-height="false" draw:fit-to-size="false" style:shrink-to-fit="false" fo:min-height="0cm" fo:min-width="0cm" fo:padding-top="0.254cm" fo:padding-bottom="0.125cm" fo:padding-left="0.457cm" fo:padding-right="0.305cm" fo:wrap-option="wrap" draw:shadow="visible" draw:shadow-offset-x="0cm" draw:shadow-offset-y="0.064cm" draw:shadow-color="#000000" draw:shadow-opacity="35%" loext:shadow-blur="0.111cm" loext:decorative="false"/>
      <style:paragraph-properties style:writing-mode="lr-tb"/>
    </style:style>
    <style:style style:name="gr65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66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67" style:family="graphic" style:parent-style-name="standard" style:list-style-name="L6">
      <style:graphic-properties draw:stroke="solid" svg:stroke-width="0.026cm" svg:stroke-color="#6b7280" svg:stroke-linecap="butt" draw:fill="solid" draw:fill-color="#f3f4f6" draw:textarea-horizontal-align="justify" draw:textarea-vertical-align="middle" draw:auto-grow-height="false" draw:fit-to-size="false" style:shrink-to-fit="false" fo:min-height="0cm" fo:min-width="0cm" fo:padding-top="0.254cm" fo:padding-bottom="0.125cm" fo:padding-left="0.457cm" fo:padding-right="0.305cm" fo:wrap-option="wrap" draw:shadow="visible" draw:shadow-offset-x="0cm" draw:shadow-offset-y="0.064cm" draw:shadow-color="#000000" draw:shadow-opacity="35%" loext:shadow-blur="0.111cm" loext:decorative="false"/>
      <style:paragraph-properties style:writing-mode="lr-tb"/>
    </style:style>
    <style:style style:name="gr68" style:family="graphic" style:parent-style-name="standard" style:list-style-name="L6">
      <style:graphic-properties draw:stroke="solid" svg:stroke-width="0.026cm" svg:stroke-color="#6b7280" svg:stroke-linecap="butt" draw:fill="solid" draw:fill-color="#f3f4f6" draw:textarea-horizontal-align="justify" draw:textarea-vertical-align="middle" draw:auto-grow-height="false" draw:fit-to-size="false" style:shrink-to-fit="false" fo:min-height="0cm" fo:min-width="0cm" fo:padding-top="0.254cm" fo:padding-bottom="0.125cm" fo:padding-left="0.457cm" fo:padding-right="0.305cm" fo:wrap-option="wrap" draw:shadow="visible" draw:shadow-offset-x="0cm" draw:shadow-offset-y="0.064cm" draw:shadow-color="#000000" draw:shadow-opacity="35%" loext:shadow-blur="0.111cm" loext:decorative="false"/>
      <style:paragraph-properties style:writing-mode="lr-tb"/>
    </style:style>
    <style:style style:name="gr69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70" style:family="graphic" style:parent-style-name="standard" style:list-style-name="L6">
      <style:graphic-properties draw:stroke="solid" svg:stroke-width="0.026cm" svg:stroke-color="#6b7280" svg:stroke-linecap="butt" draw:fill="solid" draw:fill-color="#f3f4f6" draw:textarea-horizontal-align="justify" draw:textarea-vertical-align="middle" draw:auto-grow-height="false" draw:fit-to-size="false" style:shrink-to-fit="false" fo:min-height="0cm" fo:min-width="0cm" fo:padding-top="0.254cm" fo:padding-bottom="0.125cm" fo:padding-left="0.457cm" fo:padding-right="0.305cm" fo:wrap-option="wrap" draw:shadow="visible" draw:shadow-offset-x="0cm" draw:shadow-offset-y="0.064cm" draw:shadow-color="#000000" draw:shadow-opacity="35%" loext:shadow-blur="0.111cm" loext:decorative="false"/>
      <style:paragraph-properties style:writing-mode="lr-tb"/>
    </style:style>
    <style:style style:name="gr71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72" style:family="graphic" style:parent-style-name="standard" style:list-style-name="L6">
      <style:graphic-properties draw:stroke="solid" svg:stroke-width="0.026cm" svg:stroke-color="#6b7280" svg:stroke-linecap="butt" draw:fill="solid" draw:fill-color="#f3f4f6" draw:textarea-horizontal-align="justify" draw:textarea-vertical-align="middle" draw:auto-grow-height="false" draw:fit-to-size="false" style:shrink-to-fit="false" fo:min-height="0cm" fo:min-width="0cm" fo:padding-top="0.254cm" fo:padding-bottom="0.125cm" fo:padding-left="0.457cm" fo:padding-right="0.305cm" fo:wrap-option="wrap" draw:shadow="visible" draw:shadow-offset-x="0cm" draw:shadow-offset-y="0.064cm" draw:shadow-color="#000000" draw:shadow-opacity="35%" loext:shadow-blur="0.111cm" loext:decorative="false"/>
      <style:paragraph-properties style:writing-mode="lr-tb"/>
    </style:style>
    <style:style style:name="gr73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74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75" style:family="graphic" style:parent-style-name="standard" style:list-style-name="L6">
      <style:graphic-properties draw:stroke="solid" svg:stroke-width="0.026cm" svg:stroke-color="#6b7280" svg:stroke-linecap="butt" draw:fill="solid" draw:fill-color="#f3f4f6" draw:textarea-horizontal-align="justify" draw:textarea-vertical-align="middle" draw:auto-grow-height="false" draw:fit-to-size="false" style:shrink-to-fit="false" fo:min-height="0cm" fo:min-width="0cm" fo:padding-top="0.254cm" fo:padding-bottom="0.125cm" fo:padding-left="0.457cm" fo:padding-right="0.305cm" fo:wrap-option="wrap" draw:shadow="visible" draw:shadow-offset-x="0cm" draw:shadow-offset-y="0.064cm" draw:shadow-color="#000000" draw:shadow-opacity="35%" loext:shadow-blur="0.111cm" loext:decorative="false"/>
      <style:paragraph-properties style:writing-mode="lr-tb"/>
    </style:style>
    <style:style style:name="gr76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77" style:family="graphic" style:parent-style-name="standard" style:list-style-name="L6">
      <style:graphic-properties draw:stroke="solid" svg:stroke-width="0.026cm" svg:stroke-color="#6b7280" svg:stroke-linecap="butt" draw:fill="solid" draw:fill-color="#f3f4f6" draw:textarea-horizontal-align="justify" draw:textarea-vertical-align="middle" draw:auto-grow-height="false" draw:fit-to-size="false" style:shrink-to-fit="false" fo:min-height="0cm" fo:min-width="0cm" fo:padding-top="0.254cm" fo:padding-bottom="0.125cm" fo:padding-left="0.457cm" fo:padding-right="0.305cm" fo:wrap-option="wrap" draw:shadow="visible" draw:shadow-offset-x="0cm" draw:shadow-offset-y="0.064cm" draw:shadow-color="#000000" draw:shadow-opacity="35%" loext:shadow-blur="0.111cm" loext:decorative="false"/>
      <style:paragraph-properties style:writing-mode="lr-tb"/>
    </style:style>
    <style:style style:name="gr78" style:family="graphic" style:parent-style-name="standard" style:list-style-name="L6">
      <style:graphic-properties draw:stroke="solid" svg:stroke-width="0.026cm" svg:stroke-color="#6b7280" svg:stroke-linecap="butt" draw:fill="solid" draw:fill-color="#f3f4f6" draw:textarea-horizontal-align="justify" draw:textarea-vertical-align="middle" draw:auto-grow-height="false" draw:fit-to-size="false" style:shrink-to-fit="false" fo:min-height="0cm" fo:min-width="0cm" fo:padding-top="0.254cm" fo:padding-bottom="0.125cm" fo:padding-left="0.457cm" fo:padding-right="0.305cm" fo:wrap-option="wrap" draw:shadow="visible" draw:shadow-offset-x="0cm" draw:shadow-offset-y="0.064cm" draw:shadow-color="#000000" draw:shadow-opacity="35%" loext:shadow-blur="0.111cm" loext:decorative="false"/>
      <style:paragraph-properties style:writing-mode="lr-tb"/>
    </style:style>
    <style:style style:name="gr79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80" style:family="graphic" style:parent-style-name="standard" style:list-style-name="L6">
      <style:graphic-properties draw:stroke="solid" svg:stroke-width="0.026cm" svg:stroke-color="#6b7280" svg:stroke-linecap="butt" draw:fill="solid" draw:fill-color="#f3f4f6" draw:textarea-horizontal-align="justify" draw:textarea-vertical-align="middle" draw:auto-grow-height="false" draw:fit-to-size="false" style:shrink-to-fit="false" fo:min-height="0cm" fo:min-width="0cm" fo:padding-top="0.254cm" fo:padding-bottom="0.125cm" fo:padding-left="0.457cm" fo:padding-right="0.305cm" fo:wrap-option="wrap" draw:shadow="visible" draw:shadow-offset-x="0cm" draw:shadow-offset-y="0.064cm" draw:shadow-color="#000000" draw:shadow-opacity="35%" loext:shadow-blur="0.111cm" loext:decorative="false"/>
      <style:paragraph-properties style:writing-mode="lr-tb"/>
    </style:style>
    <style:style style:name="gr81" style:family="graphic" style:parent-style-name="standard" style:list-style-name="L6">
      <style:graphic-properties draw:stroke="solid" svg:stroke-width="0.026cm" svg:stroke-color="#6b7280" svg:stroke-linecap="butt" draw:fill="solid" draw:fill-color="#f3f4f6" draw:textarea-horizontal-align="justify" draw:textarea-vertical-align="middle" draw:auto-grow-height="false" draw:fit-to-size="false" style:shrink-to-fit="false" fo:min-height="0cm" fo:min-width="0cm" fo:padding-top="0.254cm" fo:padding-bottom="0.125cm" fo:padding-left="0.457cm" fo:padding-right="0.305cm" fo:wrap-option="wrap" draw:shadow="visible" draw:shadow-offset-x="0cm" draw:shadow-offset-y="0.064cm" draw:shadow-color="#000000" draw:shadow-opacity="35%" loext:shadow-blur="0.111cm" loext:decorative="false"/>
      <style:paragraph-properties style:writing-mode="lr-tb"/>
    </style:style>
    <style:style style:name="pr1" style:family="presentation" style:parent-style-name="Blank-notes">
      <style:graphic-properties draw:fill-color="#ffffff" draw:auto-grow-height="false" fo:min-height="13.365cm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loext:tab-stop-distance="1.27cm" style:writing-mode="lr-tb">
        <style:tab-stops/>
      </style:paragraph-properties>
      <style:text-properties fo:hyphenate="false"/>
    </style:style>
    <style:style style:name="P2" style:family="paragraph">
      <loext:graphic-properties draw:fill="solid" draw:fill-color="#0f766e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P3" style:family="paragraph">
      <style:paragraph-properties fo:margin-left="0cm" fo:margin-right="0cm" fo:margin-top="0cm" fo:margin-bottom="0.282cm" fo:line-height="100%" fo:text-align="start" fo:text-indent="0cm" style:punctuation-wrap="hanging" loext:tab-stop-distance="1.27cm" style:writing-mode="lr-tb">
        <style:tab-stops/>
      </style:paragraph-properties>
      <style:text-properties fo:hyphenate="false"/>
    </style:style>
    <style:style style:name="P4" style:family="paragraph">
      <loext:graphic-properties draw:fill="none"/>
      <style:paragraph-properties fo:margin-left="0cm" fo:margin-right="0cm" fo:margin-top="0cm" fo:margin-bottom="0.282cm" fo:line-height="100%" fo:text-align="start" fo:text-indent="0cm" style:punctuation-wrap="hanging" loext:tab-stop-distance="1.27cm" style:font-independent-line-spacing="true">
        <style:tab-stops/>
      </style:paragraph-properties>
      <style:text-properties fo:font-size="18pt" fo:hyphenate="false"/>
    </style:style>
    <style:style style:name="P5" style:family="paragraph">
      <loext:graphic-properties draw:fill="solid" draw:fill-color="#e4572e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P6" style:family="paragraph">
      <loext:graphic-properties draw:fill-color="#ffffff"/>
    </style:style>
    <style:style style:name="P7" style:family="paragraph">
      <style:paragraph-properties fo:margin-left="0cm" fo:margin-right="0cm" fo:margin-top="0cm" fo:margin-bottom="0.353cm" fo:line-height="100%" fo:text-align="start" fo:text-indent="0cm" style:punctuation-wrap="hanging" loext:tab-stop-distance="1.27cm" style:writing-mode="lr-tb">
        <style:tab-stops/>
      </style:paragraph-properties>
      <style:text-properties fo:hyphenate="false"/>
    </style:style>
    <style:style style:name="P8" style:family="paragraph">
      <style:paragraph-properties fo:margin-left="0cm" fo:margin-right="0cm" fo:margin-top="0cm" fo:margin-bottom="0.141cm" fo:line-height="100%" fo:text-align="start" fo:text-indent="0cm" style:punctuation-wrap="hanging" loext:tab-stop-distance="1.27cm" style:writing-mode="lr-tb">
        <style:tab-stops/>
      </style:paragraph-properties>
      <style:text-properties fo:hyphenate="false"/>
    </style:style>
    <style:style style:name="P9" style:family="paragraph">
      <loext:graphic-properties draw:fill="none"/>
      <style:paragraph-properties fo:margin-left="0cm" fo:margin-right="0cm" fo:margin-top="0cm" fo:margin-bottom="0.353cm" fo:line-height="100%" fo:text-align="start" fo:text-indent="0cm" style:punctuation-wrap="hanging" loext:tab-stop-distance="1.27cm" style:font-independent-line-spacing="true">
        <style:tab-stops/>
      </style:paragraph-properties>
      <style:text-properties fo:font-size="18pt" fo:hyphenate="false"/>
    </style:style>
    <style:style style:name="P10" style:family="paragraph">
      <loext:graphic-properties draw:fill="none"/>
      <style:paragraph-properties fo:text-align="start"/>
      <style:text-properties fo:font-size="18pt"/>
    </style:style>
    <style:style style:name="P11" style:family="paragraph">
      <style:paragraph-properties fo:margin-left="0cm" fo:margin-right="0cm" fo:margin-top="0cm" fo:margin-bottom="0.494cm" fo:line-height="100%" fo:text-align="start" fo:text-indent="0cm" style:punctuation-wrap="hanging" loext:tab-stop-distance="1.27cm" style:writing-mode="lr-tb">
        <style:tab-stops/>
      </style:paragraph-properties>
      <style:text-properties fo:hyphenate="false"/>
    </style:style>
    <style:style style:name="P12" style:family="paragraph">
      <loext:graphic-properties draw:fill="none"/>
      <style:paragraph-properties fo:margin-left="0cm" fo:margin-right="0cm" fo:margin-top="0cm" fo:margin-bottom="0.141cm" fo:line-height="100%" fo:text-align="start" fo:text-indent="0cm" style:punctuation-wrap="hanging" loext:tab-stop-distance="1.27cm" style:font-independent-line-spacing="true">
        <style:tab-stops/>
      </style:paragraph-properties>
      <style:text-properties fo:font-size="18pt" fo:hyphenate="false"/>
    </style:style>
    <style:style style:name="P13" style:family="paragraph">
      <loext:graphic-properties draw:fill="solid" draw:fill-color="#0f766e"/>
      <style:paragraph-properties fo:margin-left="0cm" fo:margin-right="0cm" fo:margin-top="0cm" fo:margin-bottom="0cm" fo:line-height="100%" fo:text-align="center" fo:text-indent="0cm" style:punctuation-wrap="hanging" loext:tab-stop-distance="1.27cm" style:font-independent-line-spacing="true">
        <style:tab-stops/>
      </style:paragraph-properties>
      <style:text-properties fo:font-size="18pt" fo:hyphenate="false"/>
    </style:style>
    <style:style style:name="P14" style:family="paragraph">
      <loext:graphic-properties draw:fill="solid" draw:fill-color="#6b7280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P15" style:family="paragraph">
      <loext:graphic-properties draw:fill="solid" draw:fill-color="#1f2937"/>
      <style:paragraph-properties fo:margin-left="0cm" fo:margin-right="0cm" fo:margin-top="0cm" fo:margin-bottom="0cm" fo:line-height="100%" fo:text-align="center" fo:text-indent="0cm" style:punctuation-wrap="hanging" loext:tab-stop-distance="1.27cm" style:font-independent-line-spacing="true">
        <style:tab-stops/>
      </style:paragraph-properties>
      <style:text-properties fo:font-size="18pt" fo:hyphenate="false"/>
    </style:style>
    <style:style style:name="P16" style:family="paragraph">
      <loext:graphic-properties draw:fill="solid" draw:fill-color="#e4572e"/>
      <style:paragraph-properties fo:margin-left="0cm" fo:margin-right="0cm" fo:margin-top="0cm" fo:margin-bottom="0cm" fo:line-height="100%" fo:text-align="center" fo:text-indent="0cm" style:punctuation-wrap="hanging" loext:tab-stop-distance="1.27cm" style:font-independent-line-spacing="true">
        <style:tab-stops/>
      </style:paragraph-properties>
      <style:text-properties fo:font-size="18pt" fo:hyphenate="false"/>
    </style:style>
    <style:style style:name="P17" style:family="paragraph">
      <style:paragraph-properties fo:margin-left="0cm" fo:margin-right="0cm" fo:margin-top="0cm" fo:margin-bottom="0.318cm" fo:line-height="100%" fo:text-align="start" fo:text-indent="0cm" style:punctuation-wrap="hanging" loext:tab-stop-distance="1.27cm" style:writing-mode="lr-tb">
        <style:tab-stops/>
      </style:paragraph-properties>
      <style:text-properties fo:hyphenate="false"/>
    </style:style>
    <style:style style:name="P18" style:family="paragraph">
      <loext:graphic-properties draw:fill="none"/>
      <style:paragraph-properties fo:margin-left="0cm" fo:margin-right="0cm" fo:margin-top="0cm" fo:margin-bottom="0.318cm" fo:line-height="100%" fo:text-align="start" fo:text-indent="0cm" style:punctuation-wrap="hanging" loext:tab-stop-distance="1.27cm" style:font-independent-line-spacing="true">
        <style:tab-stops/>
      </style:paragraph-properties>
      <style:text-properties fo:font-size="18pt" fo:hyphenate="false"/>
    </style:style>
    <style:style style:name="P19" style:family="paragraph">
      <style:paragraph-properties fo:margin-left="0cm" fo:margin-right="0cm" fo:margin-top="0cm" fo:margin-bottom="0.071cm" fo:line-height="100%" fo:text-align="start" fo:text-indent="0cm" style:punctuation-wrap="hanging" loext:tab-stop-distance="1.27cm" style:writing-mode="lr-tb">
        <style:tab-stops/>
      </style:paragraph-properties>
      <style:text-properties fo:hyphenate="false"/>
    </style:style>
    <style:style style:name="P20" style:family="paragraph">
      <style:paragraph-properties fo:margin-left="0cm" fo:margin-right="0cm" fo:margin-top="0cm" fo:margin-bottom="0.035cm" fo:line-height="100%" fo:text-align="start" fo:text-indent="0cm" style:punctuation-wrap="hanging" loext:tab-stop-distance="1.27cm" style:writing-mode="lr-tb">
        <style:tab-stops/>
      </style:paragraph-properties>
      <style:text-properties fo:hyphenate="false"/>
    </style:style>
    <style:style style:name="P21" style:family="paragraph">
      <loext:graphic-properties draw:fill="none"/>
      <style:paragraph-properties fo:margin-left="0cm" fo:margin-right="0cm" fo:margin-top="0cm" fo:margin-bottom="0.071cm" fo:line-height="100%" fo:text-align="start" fo:text-indent="0cm" style:punctuation-wrap="hanging" loext:tab-stop-distance="1.27cm" style:font-independent-line-spacing="true">
        <style:tab-stops/>
      </style:paragraph-properties>
      <style:text-properties fo:font-size="18pt" fo:hyphenate="false"/>
    </style:style>
    <style:style style:name="P22" style:family="paragraph">
      <style:paragraph-properties fo:margin-left="0cm" fo:margin-right="0cm" fo:margin-top="0cm" fo:margin-bottom="0.212cm" fo:line-height="100%" fo:text-align="center" fo:text-indent="0cm" style:punctuation-wrap="hanging" loext:tab-stop-distance="1.27cm" style:writing-mode="lr-tb">
        <style:tab-stops/>
      </style:paragraph-properties>
      <style:text-properties fo:hyphenate="false"/>
    </style:style>
    <style:style style:name="P23" style:family="paragraph">
      <loext:graphic-properties draw:fill="solid" draw:fill-color="#f3f4f6"/>
      <style:paragraph-properties fo:margin-left="0cm" fo:margin-right="0cm" fo:margin-top="0cm" fo:margin-bottom="0.212cm" fo:line-height="100%" fo:text-align="center" fo:text-indent="0cm" style:punctuation-wrap="hanging" loext:tab-stop-distance="1.27cm" style:font-independent-line-spacing="true">
        <style:tab-stops/>
      </style:paragraph-properties>
      <style:text-properties fo:font-size="18pt" fo:hyphenate="false"/>
    </style:style>
    <style:style style:name="P24" style:family="paragraph">
      <style:paragraph-properties fo:margin-left="0cm" fo:margin-right="0cm" fo:margin-top="0cm" fo:margin-bottom="0.423cm" fo:line-height="100%" fo:text-align="start" fo:text-indent="0cm" style:punctuation-wrap="hanging" loext:tab-stop-distance="1.27cm" style:writing-mode="lr-tb">
        <style:tab-stops/>
      </style:paragraph-properties>
      <style:text-properties fo:hyphenate="false"/>
    </style:style>
    <style:style style:name="P25" style:family="paragraph">
      <style:paragraph-properties fo:margin-left="0cm" fo:margin-right="0cm" fo:margin-top="0cm" fo:margin-bottom="0.212cm" fo:line-height="100%" fo:text-align="start" fo:text-indent="0cm" style:punctuation-wrap="hanging" loext:tab-stop-distance="1.27cm" style:writing-mode="lr-tb">
        <style:tab-stops/>
      </style:paragraph-properties>
      <style:text-properties fo:hyphenate="false"/>
    </style:style>
    <style:style style:name="P26" style:family="paragraph">
      <loext:graphic-properties draw:fill="none"/>
      <style:paragraph-properties fo:margin-left="0cm" fo:margin-right="0cm" fo:margin-top="0cm" fo:margin-bottom="0.212cm" fo:line-height="100%" fo:text-align="start" fo:text-indent="0cm" style:punctuation-wrap="hanging" loext:tab-stop-distance="1.27cm" style:font-independent-line-spacing="true">
        <style:tab-stops/>
      </style:paragraph-properties>
      <style:text-properties fo:font-size="18pt" fo:hyphenate="false"/>
    </style:style>
    <style:style style:name="P27" style:family="paragraph">
      <style:paragraph-properties fo:margin-left="0cm" fo:margin-right="0cm" fo:margin-top="0cm" fo:margin-bottom="0.564cm" fo:line-height="100%" fo:text-align="start" fo:text-indent="0cm" style:punctuation-wrap="hanging" loext:tab-stop-distance="1.27cm" style:writing-mode="lr-tb">
        <style:tab-stops/>
      </style:paragraph-properties>
      <style:text-properties fo:hyphenate="false"/>
    </style:style>
    <style:style style:name="P28" style:family="paragraph">
      <style:paragraph-properties fo:margin-left="0cm" fo:margin-right="0cm" fo:margin-top="0cm" fo:margin-bottom="0.282cm" fo:line-height="100%" fo:text-align="center" fo:text-indent="0cm" style:punctuation-wrap="hanging" loext:tab-stop-distance="1.27cm" style:writing-mode="lr-tb">
        <style:tab-stops/>
      </style:paragraph-properties>
      <style:text-properties fo:hyphenate="false"/>
    </style:style>
    <style:style style:name="P29" style:family="paragraph">
      <loext:graphic-properties draw:fill="none"/>
      <style:paragraph-properties fo:margin-left="0cm" fo:margin-right="0cm" fo:margin-top="0cm" fo:margin-bottom="0.282cm" fo:line-height="100%" fo:text-align="center" fo:text-indent="0cm" style:punctuation-wrap="hanging" loext:tab-stop-distance="1.27cm" style:font-independent-line-spacing="true">
        <style:tab-stops/>
      </style:paragraph-properties>
      <style:text-properties fo:font-size="18pt" fo:hyphenate="false"/>
    </style:style>
    <style:style style:name="P30" style:family="paragraph">
      <style:paragraph-properties fo:margin-left="0cm" fo:margin-right="0cm" fo:margin-top="0cm" fo:margin-bottom="0.459cm" fo:line-height="100%" fo:text-align="start" fo:text-indent="0cm" style:punctuation-wrap="hanging" loext:tab-stop-distance="1.27cm" style:writing-mode="lr-tb">
        <style:tab-stops/>
      </style:paragraph-properties>
      <style:text-properties fo:hyphenate="false"/>
    </style:style>
    <style:style style:name="P31" style:family="paragraph">
      <loext:graphic-properties draw:fill="none"/>
      <style:paragraph-properties fo:margin-left="0cm" fo:margin-right="0cm" fo:margin-top="0cm" fo:margin-bottom="0.459cm" fo:line-height="100%" fo:text-align="start" fo:text-indent="0cm" style:punctuation-wrap="hanging" loext:tab-stop-distance="1.27cm" style:font-independent-line-spacing="true">
        <style:tab-stops/>
      </style:paragraph-properties>
      <style:text-properties fo:font-size="18pt" fo:hyphenate="false"/>
    </style:style>
    <style:style style:name="P32" style:family="paragraph">
      <loext:graphic-properties draw:fill="solid" draw:fill-color="#0f766e"/>
      <style:paragraph-properties fo:margin-left="0cm" fo:margin-right="0cm" fo:margin-top="0cm" fo:margin-bottom="0.282cm" fo:line-height="100%" fo:text-align="center" fo:text-indent="0cm" style:punctuation-wrap="hanging" loext:tab-stop-distance="1.27cm" style:font-independent-line-spacing="true">
        <style:tab-stops/>
      </style:paragraph-properties>
      <style:text-properties fo:font-size="18pt" fo:hyphenate="false"/>
    </style:style>
    <style:style style:name="T1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T2" style:family="text">
      <style:text-properties fo:font-variant="normal" fo:text-transform="none" fo:color="#1f2937" loext:opacity="100%" style:text-outline="false" style:text-line-through-style="none" style:text-line-through-type="none" style:text-position="0% 100%" style:font-name="Calibri" fo:font-size="40pt" fo:letter-spacing="normal" fo:language="en" fo:country="US" fo:font-style="normal" style:text-underline-style="none" fo:font-weight="bold" fo:background-color="transparent" style:font-size-asian="40pt" style:font-style-asian="normal" style:font-weight-asian="bold" style:font-size-complex="40pt" style:font-style-complex="normal" style:font-weight-complex="bold"/>
    </style:style>
    <style:style style:name="T3" style:family="text">
      <style:text-properties fo:font-variant="normal" fo:text-transform="none" fo:color="#1f2937" loext:opacity="100%" style:text-outline="false" style:text-line-through-style="none" style:text-line-through-type="none" style:text-position="0% 100%" style:font-name="Calibri" fo:font-size="19pt" fo:letter-spacing="normal" fo:language="en" fo:country="US" fo:font-style="normal" style:text-underline-style="none" fo:font-weight="normal" fo:background-color="transparent" style:font-size-asian="19pt" style:font-style-asian="normal" style:font-weight-asian="normal" style:font-size-complex="19pt" style:font-style-complex="normal" style:font-weight-complex="normal"/>
    </style:style>
    <style:style style:name="T4" style:family="text">
      <style:text-properties fo:font-variant="normal" fo:text-transform="none" fo:color="#6b7280" loext:opacity="100%" style:text-outline="false" style:text-line-through-style="none" style:text-line-through-type="none" style:text-position="0% 100%" style:font-name="Calibri" fo:font-size="16pt" fo:letter-spacing="normal" fo:language="en" fo:country="US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T5" style:family="text">
      <style:text-properties fo:font-variant="normal" fo:text-transform="none" fo:color="#1f2937" loext:opacity="100%" style:text-outline="false" style:text-line-through-style="none" style:text-line-through-type="none" style:text-position="0% 100%" style:font-name="Calibri" fo:font-size="30pt" fo:letter-spacing="normal" fo:language="en" fo:country="US" fo:font-style="normal" style:text-underline-style="none" fo:font-weight="bold" fo:background-color="transparent" style:font-size-asian="30pt" style:font-style-asian="normal" style:font-weight-asian="bold" style:font-size-complex="30pt" style:font-style-complex="normal" style:font-weight-complex="bold"/>
    </style:style>
    <style:style style:name="T6" style:family="text">
      <style:text-properties fo:font-variant="normal" fo:text-transform="none" fo:color="#6b7280" loext:opacity="10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T7" style:family="text">
      <style:text-properties fo:font-variant="normal" fo:text-transform="none" fo:color="#1f2937" loext:opacity="100%" style:text-outline="false" style:text-line-through-style="none" style:text-line-through-type="none" style:text-position="0% 100%" style:font-name="Calibri" fo:font-size="19pt" fo:letter-spacing="normal" fo:language="en" fo:country="US" fo:font-style="normal" style:text-underline-style="none" fo:font-weight="bold" fo:background-color="transparent" style:font-size-asian="19pt" style:font-style-asian="normal" style:font-weight-asian="bold" style:font-size-complex="19pt" style:font-style-complex="normal" style:font-weight-complex="bold"/>
    </style:style>
    <style:style style:name="T8" style:family="text">
      <style:text-properties fo:font-variant="normal" fo:text-transform="none" fo:color="#6b7280" loext:opacity="100%" style:text-outline="false" style:text-line-through-style="none" style:text-line-through-type="none" style:text-position="0% 100%" style:font-name="Calibri" fo:font-size="13pt" fo:letter-spacing="normal" fo:language="en" fo:country="US" fo:font-style="normal" style:text-underline-style="none" fo:font-weight="normal" fo:background-color="transparent" style:font-size-asian="13pt" style:font-style-asian="normal" style:font-weight-asian="normal" style:font-size-complex="13pt" style:font-style-complex="normal" style:font-weight-complex="normal"/>
    </style:style>
    <style:style style:name="T9" style:family="text">
      <style:text-properties fo:font-variant="normal" fo:text-transform="none" fo:color="#1f2937" loext:opacity="100%" style:text-outline="false" style:text-line-through-style="none" style:text-line-through-type="none" style:text-position="0% 100%" style:font-name="Calibri" fo:font-size="22pt" fo:letter-spacing="normal" fo:language="en" fo:country="US" fo:font-style="normal" style:text-underline-style="none" fo:font-weight="bold" fo:background-color="transparent" style:font-size-asian="22pt" style:font-style-asian="normal" style:font-weight-asian="bold" style:font-size-complex="22pt" style:font-style-complex="normal" style:font-weight-complex="bold"/>
    </style:style>
    <style:style style:name="T10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5pt" fo:letter-spacing="normal" fo:language="en" fo:country="US" fo:font-style="normal" style:text-underline-style="none" fo:font-weight="bold" fo:background-color="transparent" style:font-size-asian="15pt" style:font-style-asian="normal" style:font-weight-asian="bold" style:font-size-complex="15pt" style:font-style-complex="normal" style:font-weight-complex="bold"/>
    </style:style>
    <style:style style:name="T11" style:family="text">
      <style:text-properties fo:font-variant="normal" fo:text-transform="none" fo:color="#1f2937" loext:opacity="100%" style:text-outline="false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12" style:family="text">
      <style:text-properties fo:font-variant="normal" fo:text-transform="none" fo:color="#1f2937" loext:opacity="100%" style:text-outline="false" style:text-line-through-style="none" style:text-line-through-type="none" style:text-position="0% 100%" style:font-name="Calibri" fo:font-size="16pt" fo:letter-spacing="normal" fo:language="en" fo:country="US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T13" style:family="text">
      <style:text-properties fo:font-variant="normal" fo:text-transform="none" fo:color="#1f2937" loext:opacity="100%" style:text-outline="false" style:text-line-through-style="none" style:text-line-through-type="none" style:text-position="0% 100%" style:font-name="Calibri" fo:font-size="16pt" fo:letter-spacing="normal" fo:language="en" fo:country="US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/>
    </style:style>
    <style:style style:name="T14" style:family="text">
      <style:text-properties fo:font-variant="normal" fo:text-transform="none" fo:color="#e4572e" loext:opacity="100%" style:text-outline="false" style:text-line-through-style="none" style:text-line-through-type="none" style:text-position="0% 100%" style:font-name="Calibri" fo:font-size="16pt" fo:letter-spacing="normal" fo:language="en" fo:country="US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T15" style:family="text">
      <style:text-properties fo:font-variant="normal" fo:text-transform="none" fo:color="#0f766e" loext:opacity="100%" style:text-outline="false" style:text-line-through-style="none" style:text-line-through-type="none" style:text-position="0% 100%" style:font-name="Calibri" fo:font-size="15pt" fo:letter-spacing="normal" fo:language="en" fo:country="US" fo:font-style="normal" style:text-underline-style="none" fo:font-weight="bold" fo:background-color="transparent" style:font-size-asian="15pt" style:font-style-asian="normal" style:font-weight-asian="bold" style:font-size-complex="15pt" style:font-style-complex="normal" style:font-weight-complex="bold"/>
    </style:style>
    <style:style style:name="T16" style:family="text">
      <style:text-properties fo:font-variant="normal" fo:text-transform="none" fo:color="#1f2937" loext:opacity="100%" style:text-outline="false" style:text-line-through-style="none" style:text-line-through-type="none" style:text-position="0% 100%" style:font-name="Consolas" fo:font-size="14pt" fo:letter-spacing="normal" fo:language="en" fo:country="US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T17" style:family="text">
      <style:text-properties fo:font-variant="normal" fo:text-transform="none" fo:color="#6b7280" loext:opacity="100%" style:text-outline="false" style:text-line-through-style="none" style:text-line-through-type="none" style:text-position="0% 100%" style:font-name="Calibri" fo:font-size="15pt" fo:letter-spacing="normal" fo:language="en" fo:country="US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/>
    </style:style>
    <style:style style:name="T18" style:family="text">
      <style:text-properties fo:font-variant="normal" fo:text-transform="none" fo:color="#1f2937" loext:opacity="100%" style:text-outline="false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bold" fo:background-color="transparent" style:font-size-asian="20pt" style:font-style-asian="normal" style:font-weight-asian="bold" style:font-size-complex="20pt" style:font-style-complex="normal" style:font-weight-complex="bold"/>
    </style:style>
    <style:style style:name="T19" style:family="text">
      <style:text-properties fo:font-variant="normal" fo:text-transform="none" fo:color="#0f766e" loext:opacity="100%" style:text-outline="false" style:text-line-through-style="none" style:text-line-through-type="none" style:text-position="0% 100%" style:font-name="Calibri" fo:font-size="22pt" fo:letter-spacing="normal" fo:language="en" fo:country="US" fo:font-style="normal" style:text-underline-style="none" fo:font-weight="bold" fo:background-color="transparent" style:font-size-asian="22pt" style:font-style-asian="normal" style:font-weight-asian="bold" style:font-size-complex="22pt" style:font-style-complex="normal" style:font-weight-complex="bold"/>
    </style:style>
    <style:style style:name="T20" style:family="text">
      <style:text-properties fo:font-variant="normal" fo:text-transform="none" fo:color="#e4572e" loext:opacity="100%" style:text-outline="false" style:text-line-through-style="none" style:text-line-through-type="none" style:text-position="0% 100%" style:font-name="Calibri" fo:font-size="19pt" fo:letter-spacing="normal" fo:language="en" fo:country="US" fo:font-style="normal" style:text-underline-style="none" fo:font-weight="bold" fo:background-color="transparent" style:font-size-asian="19pt" style:font-style-asian="normal" style:font-weight-asian="bold" style:font-size-complex="19pt" style:font-style-complex="normal" style:font-weight-complex="bold"/>
    </style:style>
    <style:style style:name="T21" style:family="text">
      <style:text-properties fo:font-variant="normal" fo:text-transform="none" fo:color="#e4572e" loext:opacity="100%" style:text-outline="false" style:text-line-through-style="none" style:text-line-through-type="none" style:text-position="0% 100%" style:font-name="Calibri" fo:font-size="22pt" fo:letter-spacing="normal" fo:language="en" fo:country="US" fo:font-style="normal" style:text-underline-style="none" fo:font-weight="bold" fo:background-color="transparent" style:font-size-asian="22pt" style:font-style-asian="normal" style:font-weight-asian="bold" style:font-size-complex="22pt" style:font-style-complex="normal" style:font-weight-complex="bold"/>
    </style:style>
    <style:style style:name="T22" style:family="text">
      <style:text-properties fo:font-variant="normal" fo:text-transform="none" fo:color="#1f2937" loext:opacity="100%" style:text-outline="false" style:text-line-through-style="none" style:text-line-through-type="none" style:text-position="0% 100%" style:font-name="Calibri" fo:font-size="17pt" fo:letter-spacing="normal" fo:language="en" fo:country="US" fo:font-style="normal" style:text-underline-style="none" fo:font-weight="normal" fo:background-color="transparent" style:font-size-asian="17pt" style:font-style-asian="normal" style:font-weight-asian="normal" style:font-size-complex="17pt" style:font-style-complex="normal" style:font-weight-complex="normal"/>
    </style:style>
    <style:style style:name="T23" style:family="text">
      <style:text-properties fo:font-variant="normal" fo:text-transform="none" fo:color="#1f2937" loext:opacity="100%" style:text-outline="false" style:text-line-through-style="none" style:text-line-through-type="none" style:text-position="0% 100%" style:font-name="Calibri" fo:font-size="17pt" fo:letter-spacing="normal" fo:language="en" fo:country="US" fo:font-style="normal" style:text-underline-style="none" fo:font-weight="bold" fo:background-color="transparent" style:font-size-asian="17pt" style:font-style-asian="normal" style:font-weight-asian="bold" style:font-size-complex="17pt" style:font-style-complex="normal" style:font-weight-complex="bold"/>
    </style:style>
    <style:style style:name="T24" style:family="text">
      <style:text-properties fo:font-variant="normal" fo:text-transform="none" fo:color="#e4572e" loext:opacity="100%" style:text-outline="false" style:text-line-through-style="none" style:text-line-through-type="none" style:text-position="0% 100%" style:font-name="Calibri" fo:font-size="17pt" fo:letter-spacing="normal" fo:language="en" fo:country="US" fo:font-style="normal" style:text-underline-style="none" fo:font-weight="normal" fo:background-color="transparent" style:font-size-asian="17pt" style:font-style-asian="normal" style:font-weight-asian="normal" style:font-size-complex="17pt" style:font-style-complex="normal" style:font-weight-complex="normal"/>
    </style:style>
    <style:style style:name="T25" style:family="text">
      <style:text-properties fo:font-variant="normal" fo:text-transform="none" fo:color="#1f2937" loext:opacity="100%" style:text-outline="false" style:text-line-through-style="none" style:text-line-through-type="none" style:text-position="0% 100%" style:font-name="Calibri" fo:font-size="21pt" fo:letter-spacing="normal" fo:language="en" fo:country="US" fo:font-style="normal" style:text-underline-style="none" fo:font-weight="normal" fo:background-color="transparent" style:font-size-asian="21pt" style:font-style-asian="normal" style:font-weight-asian="normal" style:font-size-complex="21pt" style:font-style-complex="normal" style:font-weight-complex="normal"/>
    </style:style>
    <style:style style:name="T26" style:family="text">
      <style:text-properties fo:font-variant="normal" fo:text-transform="none" fo:color="#1f2937" loext:opacity="100%" style:text-outline="false" style:text-line-through-style="none" style:text-line-through-type="none" style:text-position="0% 100%" style:font-name="Calibri" fo:font-size="21pt" fo:letter-spacing="normal" fo:language="en" fo:country="US" fo:font-style="normal" style:text-underline-style="none" fo:font-weight="bold" fo:background-color="transparent" style:font-size-asian="21pt" style:font-style-asian="normal" style:font-weight-asian="bold" style:font-size-complex="21pt" style:font-style-complex="normal" style:font-weight-complex="bold"/>
    </style:style>
    <style:style style:name="T27" style:family="text">
      <style:text-properties fo:font-variant="normal" fo:text-transform="none" fo:color="#0f766e" loext:opacity="100%" style:text-outline="false" style:text-line-through-style="none" style:text-line-through-type="none" style:text-position="0% 100%" style:font-name="Calibri" fo:font-size="28pt" fo:letter-spacing="normal" fo:language="en" fo:country="US" fo:font-style="normal" style:text-underline-style="none" fo:font-weight="bold" fo:background-color="transparent" style:font-size-asian="28pt" style:font-style-asian="normal" style:font-weight-asian="bold" style:font-size-complex="28pt" style:font-style-complex="normal" style:font-weight-complex="bold"/>
    </style:style>
    <style:style style:name="T28" style:family="text">
      <style:text-properties fo:font-variant="normal" fo:text-transform="none" fo:color="#6b7280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29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40pt" fo:letter-spacing="normal" fo:language="en" fo:country="US" fo:font-style="normal" style:text-underline-style="none" fo:font-weight="bold" fo:background-color="transparent" style:font-size-asian="40pt" style:font-style-asian="normal" style:font-weight-asian="bold" style:font-size-complex="40pt" style:font-style-complex="normal" style:font-weight-complex="bold"/>
    </style:style>
    <style:style style:name="T30" style:family="text">
      <style:text-properties fo:font-variant="normal" fo:text-transform="none" fo:color="#0f766e" loext:opacity="100%" style:text-outline="false" style:text-line-through-style="none" style:text-line-through-type="none" style:text-position="0% 100%" style:font-name="Calibri" fo:font-size="17pt" fo:letter-spacing="normal" fo:language="en" fo:country="US" fo:font-style="normal" style:text-underline-style="none" fo:font-weight="bold" fo:background-color="transparent" style:font-size-asian="17pt" style:font-style-asian="normal" style:font-weight-asian="bold" style:font-size-complex="17pt" style:font-style-complex="normal" style:font-weight-complex="bold"/>
    </style:style>
    <style:style style:name="T31" style:family="text">
      <style:text-properties fo:font-variant="normal" fo:text-transform="none" fo:color="#1f2937" loext:opacity="100%" style:text-outline="false" style:text-line-through-style="none" style:text-line-through-type="none" style:text-position="0% 100%" style:font-name="Consolas" fo:font-size="16pt" fo:letter-spacing="normal" fo:language="en" fo:country="US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T32" style:family="text">
      <style:text-properties fo:font-variant="normal" fo:text-transform="none" fo:color="#0f766e" loext:opacity="100%" style:text-outline="false" style:text-line-through-style="none" style:text-line-through-type="none" style:text-position="0% 100%" style:font-name="Calibri" fo:font-size="16pt" fo:letter-spacing="normal" fo:language="en" fo:country="US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/>
    </style:style>
    <style:style style:name="T33" style:family="text">
      <style:text-properties fo:font-variant="normal" fo:text-transform="none" fo:color="#1f2937" loext:opacity="100%" style:text-outline="false" style:text-line-through-style="none" style:text-line-through-type="none" style:text-position="0% 100%" style:font-name="Consolas" fo:font-size="15pt" fo:letter-spacing="normal" fo:language="en" fo:country="US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/>
    </style:style>
    <style:style style:name="T34" style:family="text">
      <style:text-properties fo:font-variant="normal" fo:text-transform="none" fo:color="#0f766e" loext:opacity="100%" style:text-outline="false" style:text-line-through-style="none" style:text-line-through-type="none" style:text-position="0% 100%" style:font-name="Calibri" fo:font-size="13pt" fo:letter-spacing="normal" fo:language="en" fo:country="US" fo:font-style="normal" style:text-underline-style="none" fo:font-weight="bold" fo:background-color="transparent" style:font-size-asian="13pt" style:font-style-asian="normal" style:font-weight-asian="bold" style:font-size-complex="13pt" style:font-style-complex="normal" style:font-weight-complex="bold"/>
    </style:style>
    <style:style style:name="T35" style:family="text">
      <style:text-properties fo:font-variant="normal" fo:text-transform="none" fo:color="#1f2937" loext:opacity="100%" style:text-outline="false" style:text-line-through-style="none" style:text-line-through-type="none" style:text-position="0% 100%" style:font-name="Consolas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T36" style:family="text">
      <style:text-properties fo:font-variant="normal" fo:text-transform="none" fo:color="#0f766e" loext:opacity="100%" style:text-outline="false" style:text-line-through-style="none" style:text-line-through-type="none" style:text-position="0% 100%" style:font-name="Calibri" fo:font-size="14pt" fo:letter-spacing="normal" fo:language="en" fo:country="US" fo:font-style="normal" style:text-underline-style="none" fo:font-weight="bold" fo:background-color="transparent" style:font-size-asian="14pt" style:font-style-asian="normal" style:font-weight-asian="bold" style:font-size-complex="14pt" style:font-style-complex="normal" style:font-weight-complex="bold"/>
    </style:style>
    <style:style style:name="T37" style:family="text">
      <style:text-properties fo:font-variant="normal" fo:text-transform="none" fo:color="#1f2937" loext:opacity="100%" style:text-outline="false" style:text-line-through-style="none" style:text-line-through-type="none" style:text-position="0% 100%" style:font-name="Consolas" fo:font-size="13pt" fo:letter-spacing="normal" fo:language="en" fo:country="US" fo:font-style="normal" style:text-underline-style="none" fo:font-weight="normal" fo:background-color="transparent" style:font-size-asian="13pt" style:font-style-asian="normal" style:font-weight-asian="normal" style:font-size-complex="13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fo:color="#1f2937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fo:color="#6b728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OpenSymbol" fo:color="#e4572e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OpenSymbol" fo:color="#0f766e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">
        <draw:custom-shape draw:name="Rectangle 1" draw:style-name="gr1" draw:text-style-name="P2" draw:layer="layout" svg:width="33.865cm" svg:height="0.71cm" svg:x="0cm" svg:y="0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" draw:style-name="gr2" draw:text-style-name="P4" draw:layer="layout" svg:width="29.209cm" svg:height="5.587cm" svg:x="2.286cm" svg:y="5.08cm">
          <text:p text:style-name="P3"><text:span text:style-name="T2">An Adaptive Large Neighborhood Search</text:span></text:p>
          <text:p text:style-name="P3"><text:span text:style-name="T2">for the Prize-Collecting Skill Vehicle Routing Proble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" draw:style-name="gr3" draw:text-style-name="P4" draw:layer="layout" svg:width="29.209cm" svg:height="4.063cm" svg:x="2.286cm" svg:y="11.176cm">
          <text:p text:style-name="P3"><text:span text:style-name="T3">Umais Chaudhary <text:s/>· <text:s/>Rehman Kerimov <text:s/>· <text:s/>Dustin Schulz <text:s/>· <text:s/>Marco Leander vom Orde</text:span></text:p>
          <text:p text:style-name="P3"><text:span text:style-name="T4">31-MM34 Metaheuristics · SoSe 26 · Bielefeld Universit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4" draw:text-style-name="P5" draw:layer="layout" svg:width="33.865cm" svg:height="0.71cm" svg:x="0cm" svg:y="18.339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9.798cm" svg:height="11.136cm" svg:x="0.6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ank">
        <draw:custom-shape draw:name="Rectangle 1" draw:style-name="gr4" draw:text-style-name="P5" draw:layer="layout" svg:width="0.355cm" svg:height="1.574cm" svg:x="1.397cm" svg:y="1.067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" draw:style-name="gr6" draw:text-style-name="P4" draw:layer="layout" svg:width="29.463cm" svg:height="2.285cm" svg:x="2.159cm" svg:y="0.813cm">
          <text:p text:style-name="P3"><text:span text:style-name="T5">The problem: pharmacy home deliver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" draw:style-name="gr7" draw:text-style-name="P4" draw:layer="layout" svg:width="1.777cm" svg:height="1.015cm" svg:x="31.75cm" svg:y="17.653cm">
          <text:p text:style-name="P3"><text:span text:style-name="T6">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8" draw:text-style-name="P9" draw:layer="layout" svg:width="14.985cm" svg:height="13.715cm" svg:x="2.159cm" svg:y="3.81cm">
          <text:p text:style-name="P7"><text:span text:style-name="T3">• <text:s/>Customers: profit, time window, required skills</text:span></text:p>
          <text:p text:style-name="P7"><text:span text:style-name="T3">• <text:s/>Couriers: skill set, shift, start/end at pharmacy</text:span></text:p>
          <text:p text:style-name="P7"><text:span text:style-name="T3">• <text:s/>Serving is optional – maximize collected profit</text:span></text:p>
          <text:p text:style-name="P7"><text:span text:style-name="T3">• <text:s/>Feasibility: skills, time windows, shift end</text:span></text:p>
          <text:p text:style-name="P7"><text:span text:style-name="T3">• <text:s/>20 instances: n = 50 … 1000, 2–25 couriers</text:span></text:p>
          <text:p text:style-name="P3"><text:span text:style-name="T3"/></text:p>
          <text:p text:style-name="P8"><text:span text:style-name="T7">• <text:s/>Yardstick: singleton upper bound (UB)</text:span></text:p>
          <text:p text:style-name="P3"><text:span text:style-name="T4"><text:s text:c="4"/>– <text:s/>profit of all customers servable in a dedicated round trip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5" draw:style-name="gr9" draw:text-style-name="P10" draw:layer="layout" svg:width="14.985cm" svg:height="11.239cm" svg:x="18cm" svg:y="3.761cm">
          <draw:image xlink:href="Pictures/10000001000005A000000438EA86FD1F.png" xlink:type="simple" xlink:show="embed" xlink:actuate="onLoad" draw:mime-type="image/png">
            <text:p/>
          </draw:image>
          <svg:desc>fig_problem.png</svg:desc>
        </draw:frame>
        <draw:custom-shape draw:name="TextBox 6" draw:style-name="gr10" draw:text-style-name="P4" draw:layer="layout" svg:width="14.985cm" svg:height="1.269cm" svg:x="17.78cm" svg:y="17.018cm">
          <text:p text:style-name="P3"><text:span text:style-name="T8">n = 50 instance, our 30 s solution: 27 of 50 customers serve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9.797cm" svg:height="11.136cm" svg:x="0.601cm" svg:y="2.257cm" draw:page-number="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ank">
        <draw:custom-shape draw:name="Rectangle 1" draw:style-name="gr4" draw:text-style-name="P5" draw:layer="layout" svg:width="0.355cm" svg:height="1.574cm" svg:x="1.397cm" svg:y="1.067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" draw:style-name="gr11" draw:text-style-name="P4" draw:layer="layout" svg:width="29.463cm" svg:height="2.285cm" svg:x="2.159cm" svg:y="0.813cm">
          <text:p text:style-name="P3"><text:span text:style-name="T5">Why ALNS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" draw:style-name="gr12" draw:text-style-name="P4" draw:layer="layout" svg:width="1.777cm" svg:height="1.015cm" svg:x="31.75cm" svg:y="17.653cm">
          <text:p text:style-name="P3"><text:span text:style-name="T6">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13" draw:text-style-name="P12" draw:layer="layout" svg:width="29.463cm" svg:height="13.715cm" svg:x="2.159cm" svg:y="3.81cm">
          <text:p text:style-name="P8"><text:span text:style-name="T9">• <text:s/>Selection + routing in one move</text:span></text:p>
          <text:p text:style-name="P11"><text:span text:style-name="T4"><text:s text:c="4"/>– <text:s/>destroy/repair changes the served set directly – repairs can grow it</text:span></text:p>
          <text:p text:style-name="P8"><text:span text:style-name="T9">• <text:s/>Extremely heterogeneous benchmark</text:span></text:p>
          <text:p text:style-name="P8"><text:span text:style-name="T4"><text:s text:c="4"/>– <text:s/>pure Python, 30 s budget: ~30,000 iterations on n=50, ~600 on n=1000</text:span></text:p>
          <text:p text:style-name="P11"><text:span text:style-name="T4"><text:s text:c="4"/>– <text:s/>adaptive weights re-allocate effort per instance, no per-instance tuning</text:span></text:p>
          <text:p text:style-name="P8"><text:span text:style-name="T9">• <text:s/>Rugged feasibility (skills + time windows)</text:span></text:p>
          <text:p text:style-name="P11"><text:span text:style-name="T4"><text:s text:c="4"/>– <text:s/>simulated annealing on a penalized score crosses infeasible ridges</text:span></text:p>
          <text:p text:style-name="P8"><text:span text:style-name="T9">• <text:s/>Validated on the closest published relative</text:span></text:p>
          <text:p text:style-name="P3"><text:span text:style-name="T4"><text:s text:c="4"/>– <text:s/>service technician routing, Kovacs et al. 2012 · framework: Ropke &amp; Pisinger 200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9.797cm" svg:height="11.136cm" svg:x="0.601cm" svg:y="2.257cm" draw:page-number="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ank">
        <draw:custom-shape draw:name="Rectangle 1" draw:style-name="gr4" draw:text-style-name="P5" draw:layer="layout" svg:width="0.355cm" svg:height="1.574cm" svg:x="1.397cm" svg:y="1.067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" draw:style-name="gr14" draw:text-style-name="P4" draw:layer="layout" svg:width="29.463cm" svg:height="2.285cm" svg:x="2.159cm" svg:y="0.813cm">
          <text:p text:style-name="P3"><text:span text:style-name="T5">The solver at a glanc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" draw:style-name="gr15" draw:text-style-name="P4" draw:layer="layout" svg:width="1.777cm" svg:height="1.015cm" svg:x="31.75cm" svg:y="17.653cm">
          <text:p text:style-name="P3"><text:span text:style-name="T6">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4" draw:style-name="gr16" draw:text-style-name="P13" draw:layer="layout" svg:width="5.46cm" svg:height="3.174cm" svg:x="1.778cm" svg:y="4.826cm">
          <text:p text:style-name="P1"><text:span text:style-name="T10">Profit-greedy</text:span></text:p>
          <text:p text:style-name="P1"><text:span text:style-name="T10">construction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Right Arrow 5" draw:style-name="gr17" draw:text-style-name="P14" draw:layer="layout" svg:width="0.812cm" svg:height="1.015cm" svg:x="7.315cm" svg:y="5.893cm">
          <text:p text:style-name="P1"><text:span text:style-name="T1"/></text:p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position-x="0" draw:handle-position-y="?f8" draw:handle-range-y-maximum="100000" draw:handle-range-y-minimum="0"/>
            <draw:handle draw:handle-position="?f5 0" draw:handle-position-x="?f5" draw:handle-position-y="0" draw:handle-range-x-maximum="?f1" draw:handle-range-x-minimum="0"/>
          </draw:enhanced-geometry>
        </draw:custom-shape>
        <draw:custom-shape draw:name="Rounded Rectangle 6" draw:style-name="gr18" draw:text-style-name="P15" draw:layer="layout" svg:width="5.46cm" svg:height="3.174cm" svg:x="8.128cm" svg:y="4.826cm">
          <text:p text:style-name="P1"><text:span text:style-name="T10">Destroy</text:span></text:p>
          <text:p text:style-name="P1"><text:span text:style-name="T10">(15 operators)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Right Arrow 7" draw:style-name="gr17" draw:text-style-name="P14" draw:layer="layout" svg:width="0.812cm" svg:height="1.015cm" svg:x="13.665cm" svg:y="5.893cm">
          <text:p text:style-name="P1"><text:span text:style-name="T1"/></text:p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position-x="0" draw:handle-position-y="?f8" draw:handle-range-y-maximum="100000" draw:handle-range-y-minimum="0"/>
            <draw:handle draw:handle-position="?f5 0" draw:handle-position-x="?f5" draw:handle-position-y="0" draw:handle-range-x-maximum="?f1" draw:handle-range-x-minimum="0"/>
          </draw:enhanced-geometry>
        </draw:custom-shape>
        <draw:custom-shape draw:name="Rounded Rectangle 8" draw:style-name="gr19" draw:text-style-name="P15" draw:layer="layout" svg:width="5.46cm" svg:height="3.174cm" svg:x="14.478cm" svg:y="4.826cm">
          <text:p text:style-name="P1"><text:span text:style-name="T10">Repair</text:span></text:p>
          <text:p text:style-name="P1"><text:span text:style-name="T10">(9 operators)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Right Arrow 9" draw:style-name="gr17" draw:text-style-name="P14" draw:layer="layout" svg:width="0.812cm" svg:height="1.015cm" svg:x="20.015cm" svg:y="5.893cm">
          <text:p text:style-name="P1"><text:span text:style-name="T1"/></text:p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position-x="0" draw:handle-position-y="?f8" draw:handle-range-y-maximum="100000" draw:handle-range-y-minimum="0"/>
            <draw:handle draw:handle-position="?f5 0" draw:handle-position-x="?f5" draw:handle-position-y="0" draw:handle-range-x-maximum="?f1" draw:handle-range-x-minimum="0"/>
          </draw:enhanced-geometry>
        </draw:custom-shape>
        <draw:custom-shape draw:name="Rounded Rectangle 10" draw:style-name="gr20" draw:text-style-name="P15" draw:layer="layout" svg:width="5.46cm" svg:height="3.174cm" svg:x="20.828cm" svg:y="4.826cm">
          <text:p text:style-name="P1"><text:span text:style-name="T10">SA acceptance</text:span></text:p>
          <text:p text:style-name="P1"><text:span text:style-name="T10">penalized score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Right Arrow 11" draw:style-name="gr17" draw:text-style-name="P14" draw:layer="layout" svg:width="0.812cm" svg:height="1.015cm" svg:x="26.365cm" svg:y="5.893cm">
          <text:p text:style-name="P1"><text:span text:style-name="T1"/></text:p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position-x="0" draw:handle-position-y="?f8" draw:handle-range-y-maximum="100000" draw:handle-range-y-minimum="0"/>
            <draw:handle draw:handle-position="?f5 0" draw:handle-position-x="?f5" draw:handle-position-y="0" draw:handle-range-x-maximum="?f1" draw:handle-range-x-minimum="0"/>
          </draw:enhanced-geometry>
        </draw:custom-shape>
        <draw:custom-shape draw:name="Rounded Rectangle 12" draw:style-name="gr21" draw:text-style-name="P16" draw:layer="layout" svg:width="5.46cm" svg:height="3.174cm" svg:x="27.178cm" svg:y="4.826cm">
          <text:p text:style-name="P1"><text:span text:style-name="T10">Adaptive weights</text:span></text:p>
          <text:p text:style-name="P1"><text:span text:style-name="T10">score / runtime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TextBox 13" draw:style-name="gr22" draw:text-style-name="P18" draw:layer="layout" svg:width="29.971cm" svg:height="13.715cm" svg:x="2.159cm" svg:y="9.398cm">
          <text:p text:style-name="P17"><text:span text:style-name="T11">• <text:s/>Loop until wall-clock deadline (1 s reserved for output)</text:span></text:p>
          <text:p text:style-name="P17"><text:span text:style-name="T11">• <text:s/>Time-based exponential cooling: T = 100 → 0.001 over the remaining budget</text:span></text:p>
          <text:p text:style-name="P17"><text:span text:style-name="T11">• <text:s/>Restart after 500 rejections: randomized greedy + reheat to 0.75·T₀</text:span></text:p>
          <text:p text:style-name="P17"><text:span text:style-name="T11">• <text:s/>Incumbent x* only replaced by feasible solutions → output always valid</text:span></text:p>
          <text:p text:style-name="P17"><text:span text:style-name="T11">• <text:s/>Constant-time insertion feasibility via cached forward time slack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9.797cm" svg:height="11.136cm" svg:x="0.601cm" svg:y="2.257cm" draw:page-number="4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ank">
        <draw:custom-shape draw:name="Rectangle 1" draw:style-name="gr4" draw:text-style-name="P5" draw:layer="layout" svg:width="0.355cm" svg:height="1.574cm" svg:x="1.397cm" svg:y="1.067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" draw:style-name="gr23" draw:text-style-name="P4" draw:layer="layout" svg:width="29.463cm" svg:height="2.285cm" svg:x="2.159cm" svg:y="0.813cm">
          <text:p text:style-name="P3"><text:span text:style-name="T5">Deep dive: route caches make moves constant-tim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" draw:style-name="gr24" draw:text-style-name="P4" draw:layer="layout" svg:width="1.777cm" svg:height="1.015cm" svg:x="31.75cm" svg:y="17.653cm">
          <text:p text:style-name="P3"><text:span text:style-name="T6">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25" draw:text-style-name="P21" draw:layer="layout" svg:width="16.763cm" svg:height="13.715cm" svg:x="2.159cm" svg:y="3.302cm">
          <text:p text:style-name="P19"><text:span text:style-name="T12">• <text:s/>Per route we cache: arrival, departure, waiting, forward time slack</text:span></text:p>
          <text:p text:style-name="P3"><text:span text:style-name="T4"><text:s text:c="4"/>– <text:s/>slack[j] = largest delay position j absorbs without violating any later window/shift</text:span></text:p>
          <text:p text:style-name="P19"><text:span text:style-name="T13">• <text:s/>Insertion test touches only the two neighboring positions</text:span></text:p>
          <text:p text:style-name="P3"><text:span text:style-name="T4"><text:s text:c="4"/>– <text:s/>thousands of candidate tests per repair pass, no re-simulation</text:span></text:p>
          <text:p text:style-name="P19"><text:span text:style-name="T12">• <text:s/>Full O(route) re-simulation only when …</text:span></text:p>
          <text:p text:style-name="P20"><text:span text:style-name="T4"><text:s text:c="4"/>– <text:s/>a route actually changes (one cache rebuild, then amortized)</text:span></text:p>
          <text:p text:style-name="P3"><text:span text:style-name="T4"><text:s text:c="4"/>– <text:s/>a route is infeasible (slacks undefined, penalty needs simulation)</text:span></text:p>
          <text:p text:style-name="P19"><text:span text:style-name="T12">• <text:s/>Move cache per (customer, courier), invalidated per route</text:span></text:p>
          <text:p text:style-name="P3"><text:span text:style-name="T4"><text:s text:c="4"/>– <text:s/>after an insertion only the changed courier is rescanned</text:span></text:p>
          <text:p text:style-name="P19"><text:span text:style-name="T14">• <text:s/>Trade-off: memory + bookkeeping per accepted move</text:span></text:p>
          <text:p text:style-name="P20"><text:span text:style-name="T4"><text:s text:c="4"/>– <text:s/>pays off: ALNS is single-trajectory – one solution, one cache set</text:span></text:p>
          <text:p text:style-name="P20"><text:span text:style-name="T4"><text:s text:c="4"/>– <text:s/>population-based methods would replicate this per individua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5" draw:style-name="gr26" draw:text-style-name="P23" draw:layer="layout" svg:width="13.588cm" svg:height="5.841cm" svg:x="19.304cm" svg:y="5.334cm">
          <text:p text:style-name="P22"><text:span text:style-name="T15">Algorithm 2: constant-time insertion test <text:s/>(customer c, courier k, position j)</text:span></text:p>
          <text:p text:style-name="P20"><text:span text:style-name="T16">t_arr <text:s/>← depart_k[j−1] + d(prev, c)</text:span></text:p>
          <text:p text:style-name="P20"><text:span text:style-name="T16">if t_arr &gt; due_c: <text:s/>return infeasible</text:span></text:p>
          <text:p text:style-name="P20"><text:span text:style-name="T16">t_dep <text:s/>← max(t_arr, ready_c) + service_c</text:span></text:p>
          <text:p text:style-name="P20"><text:span text:style-name="T16">shift <text:s/>← t_dep + d(c, next) − arrival_k[j]</text:span></text:p>
          <text:p text:style-name="P20"><text:span text:style-name="T16">return feasible <text:s/>⇔ <text:s/>shift ≤ slack_k[j]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TextBox 6" draw:style-name="gr27" draw:text-style-name="P4" draw:layer="layout" svg:width="13.461cm" svg:height="4.063cm" svg:x="19.304cm" svg:y="11.557cm">
          <text:p text:style-name="P3"><text:span text:style-name="T17">Effect: evaluation dominates runtime, so this decides how many iterations 30 s buy</text:span></text:p>
          <text:p text:style-name="P3"><text:span text:style-name="T17">(~30,000 on n=50, ~600 on n=1000, in pure Python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9.797cm" svg:height="11.136cm" svg:x="0.601cm" svg:y="2.257cm" draw:page-number="5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ank">
        <draw:custom-shape draw:name="Rectangle 1" draw:style-name="gr4" draw:text-style-name="P5" draw:layer="layout" svg:width="0.355cm" svg:height="1.574cm" svg:x="1.397cm" svg:y="1.067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" draw:style-name="gr28" draw:text-style-name="P4" draw:layer="layout" svg:width="29.463cm" svg:height="2.285cm" svg:x="2.159cm" svg:y="0.813cm">
          <text:p text:style-name="P3"><text:span text:style-name="T5">Initial solution: profit greed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" draw:style-name="gr29" draw:text-style-name="P4" draw:layer="layout" svg:width="1.777cm" svg:height="1.015cm" svg:x="31.75cm" svg:y="17.653cm">
          <text:p text:style-name="P3"><text:span text:style-name="T6">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30" draw:text-style-name="P21" draw:layer="layout" svg:width="14.477cm" svg:height="13.715cm" svg:x="2.159cm" svg:y="3.81cm">
          <text:p text:style-name="P19"><text:span text:style-name="T11">• <text:s/>Sort by decreasing profit,</text:span></text:p>
          <text:p text:style-name="P24"><text:span text:style-name="T11">• <text:s/>insert at cheapest feasible position</text:span></text:p>
          <text:p text:style-name="P24"><text:span text:style-name="T11">• <text:s/>&lt; 0.5 s even for n = 1000</text:span></text:p>
          <text:p text:style-name="P24"><text:span text:style-name="T11">• <text:s/>Feasible by design – empty plan as safe fallback</text:span></text:p>
          <text:p text:style-name="P3"><text:span text:style-name="T11"/></text:p>
          <text:p text:style-name="P8"><text:span text:style-name="T18">• <text:s/>Measured, not argued:</text:span></text:p>
          <text:p text:style-name="P8"><text:span text:style-name="T4"><text:s text:c="4"/>– <text:s/>random order reaches only 68.6 % of greedy profit</text:span></text:p>
          <text:p text:style-name="P19"><text:span text:style-name="T4"><text:s text:c="4"/>– <text:s/>multi-start over 4 orderings: better starts, same finals,</text:span></text:p>
          <text:p text:style-name="P8"><text:span text:style-name="T4"><text:s text:c="4"/>– <text:s/>4× construction cost → discarde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5" draw:style-name="gr9" draw:text-style-name="P10" draw:layer="layout" svg:width="14.477cm" svg:height="8.941cm" svg:x="17.78cm" svg:y="4.318cm">
          <draw:image xlink:href="Pictures/1000000100000550000003480795CCCF.png" xlink:type="simple" xlink:show="embed" xlink:actuate="onLoad" draw:mime-type="image/png">
            <text:p/>
          </draw:image>
          <svg:desc>fig_construction.png</svg:desc>
        </draw:frame>
        <presentation:notes draw:style-name="dp2">
          <draw:page-thumbnail draw:style-name="gr5" draw:layer="layout" svg:width="19.797cm" svg:height="11.136cm" svg:x="0.601cm" svg:y="2.257cm" draw:page-number="6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ank">
        <draw:custom-shape draw:name="Rectangle 1" draw:style-name="gr4" draw:text-style-name="P5" draw:layer="layout" svg:width="0.355cm" svg:height="1.574cm" svg:x="1.397cm" svg:y="1.067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" draw:style-name="gr31" draw:text-style-name="P4" draw:layer="layout" svg:width="29.463cm" svg:height="2.285cm" svg:x="2.159cm" svg:y="0.813cm">
          <text:p text:style-name="P3"><text:span text:style-name="T5">Operator portfolio: 15 destroy + 9 repai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" draw:style-name="gr32" draw:text-style-name="P4" draw:layer="layout" svg:width="1.777cm" svg:height="1.015cm" svg:x="31.75cm" svg:y="17.653cm">
          <text:p text:style-name="P3"><text:span text:style-name="T6">7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33" draw:text-style-name="P26" draw:layer="layout" svg:width="29.971cm" svg:height="13.715cm" svg:x="2.159cm" svg:y="3.429cm">
          <text:p text:style-name="P25"><text:span text:style-name="T19">Destroy</text:span></text:p>
          <text:p text:style-name="P25"><text:span text:style-name="T3">• <text:s/>random · cost-based (worst density, 2× worst detour, largest saving)</text:span></text:p>
          <text:p text:style-name="P25"><text:span text:style-name="T3">• <text:s/>relatedness: related, Shaw, time-only Shaw, temporal Shaw, cluster</text:span></text:p>
          <text:p text:style-name="P25"><text:span text:style-name="T3">• <text:s/>structural: route, sequence, time-window segment · history-based</text:span></text:p>
          <text:p text:style-name="P19"><text:span text:style-name="T20">• <text:s/>skill-scarcity removal – problem-specific</text:span></text:p>
          <text:p text:style-name="P3"><text:span text:style-name="T4"><text:s text:c="4"/>– <text:s/>frees contested couriers whose skills unserved customers nee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" draw:style-name="gr34" draw:text-style-name="P26" draw:layer="layout" svg:width="29.971cm" svg:height="13.715cm" svg:x="2.159cm" svg:y="11.43cm">
          <text:p text:style-name="P25"><text:span text:style-name="T21">Repair</text:span></text:p>
          <text:p text:style-name="P25"><text:span text:style-name="T3">• <text:s/>greedy best · noisy greedy · regret-2 (positions) · regret-3 (distinct couriers)</text:span></text:p>
          <text:p text:style-name="P25"><text:span text:style-name="T3">• <text:s/>single-pass: profit order, scarce-skill-first, LRFI, random position, Shaw insertion</text:span></text:p>
          <text:p text:style-name="P25"><text:span text:style-name="T3">• <text:s/>candidates = removed + up to 40 sampled unserved → repairs can grow the served se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9.797cm" svg:height="11.136cm" svg:x="0.601cm" svg:y="2.257cm" draw:page-number="7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ank">
        <draw:custom-shape draw:name="Rectangle 1" draw:style-name="gr4" draw:text-style-name="P5" draw:layer="layout" svg:width="0.355cm" svg:height="1.574cm" svg:x="1.397cm" svg:y="1.067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" draw:style-name="gr35" draw:text-style-name="P4" draw:layer="layout" svg:width="29.463cm" svg:height="2.285cm" svg:x="2.159cm" svg:y="0.813cm">
          <text:p text:style-name="P3"><text:span text:style-name="T5">Component analysis: leave-one-out abl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" draw:style-name="gr36" draw:text-style-name="P4" draw:layer="layout" svg:width="1.777cm" svg:height="1.015cm" svg:x="31.75cm" svg:y="17.653cm">
          <text:p text:style-name="P3"><text:span text:style-name="T6">8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" draw:style-name="gr9" draw:text-style-name="P10" draw:layer="layout" svg:width="20.736cm" svg:height="13.969cm" svg:x="1.397cm" svg:y="3.429cm">
          <draw:image xlink:href="Pictures/100000010000076C000005009095CA5F.png" xlink:type="simple" xlink:show="embed" xlink:actuate="onLoad" draw:mime-type="image/png">
            <text:p/>
          </draw:image>
          <svg:desc>fig_ablation.png</svg:desc>
        </draw:frame>
        <draw:custom-shape draw:name="TextBox 5" draw:style-name="gr37" draw:text-style-name="P9" draw:layer="layout" svg:width="12.191cm" svg:height="13.715cm" svg:x="21.675cm" svg:y="4.064cm">
          <text:p text:style-name="P7"><text:span text:style-name="T22">• <text:s/>3 instances × 2 seeds × 90 s per removed operator</text:span></text:p>
          <text:p text:style-name="P7"><text:span text:style-name="T23">• <text:s/>Every operator contributes on average – no dead weight</text:span></text:p>
          <text:p text:style-name="P7"><text:span text:style-name="T22">• <text:s/>Strongest: noised worst-detour (−1.7 %), Shaw removals</text:span></text:p>
          <text:p text:style-name="P7"><text:span text:style-name="T24">• <text:s/>Skill-scarcity ranks 4th → problem-specific design pays off</text:span></text:p>
          <text:p text:style-name="P19"><text:span text:style-name="T22">• <text:s/>Lower half ≈ noise floor (baseline seed spread 0.1–1.8 %), but kept: sharp worst cases act as insuranc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9.797cm" svg:height="11.136cm" svg:x="0.601cm" svg:y="2.257cm" draw:page-number="8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ank">
        <draw:custom-shape draw:name="Rectangle 1" draw:style-name="gr4" draw:text-style-name="P5" draw:layer="layout" svg:width="0.355cm" svg:height="1.574cm" svg:x="1.397cm" svg:y="1.067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" draw:style-name="gr38" draw:text-style-name="P4" draw:layer="layout" svg:width="29.463cm" svg:height="2.285cm" svg:x="2.159cm" svg:y="0.813cm">
          <text:p text:style-name="P3"><text:span text:style-name="T5">Parameter study: a flat plateau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" draw:style-name="gr39" draw:text-style-name="P4" draw:layer="layout" svg:width="1.777cm" svg:height="1.015cm" svg:x="31.75cm" svg:y="17.653cm">
          <text:p text:style-name="P3"><text:span text:style-name="T6">9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40" draw:text-style-name="P26" draw:layer="layout" svg:width="29.971cm" svg:height="13.715cm" svg:x="2.159cm" svg:y="3.81cm">
          <text:p text:style-name="P25"><text:span text:style-name="T25">• <text:s/>Grid over temperature scaling, destroy sizes, candidate pool, stagnation limit</text:span></text:p>
          <text:p text:style-name="P27"><text:span text:style-name="T4"><text:s text:c="4"/>– <text:s/>16 configurations × 3 instances × 2 seeds × 30 s, common random numbers</text:span></text:p>
          <text:p text:style-name="P27"><text:span text:style-name="T25">• <text:s/>Top configurations within 0.4 pp of each other – inside seed noise</text:span></text:p>
          <text:p text:style-name="P25"><text:span text:style-name="T26">• <text:s/>Validation: nominal winner re-run on all 20 instanc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" draw:style-name="gr41" draw:text-style-name="P29" draw:layer="layout" svg:width="25.399cm" svg:height="1.435cm" svg:x="4.064cm" svg:y="10.287cm">
          <text:p text:style-name="P28"><text:span text:style-name="T27">winner 322,587 <text:s/>vs. <text:s/>defaults 323,172 <text:s text:c="2"/>(−0.2 %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42" draw:text-style-name="P26" draw:layer="layout" svg:width="29.971cm" svg:height="13.715cm" svg:x="2.159cm" svg:y="13.589cm">
          <text:p text:style-name="P25"><text:span text:style-name="T25">• <text:s/>Tuning on 3 instances does not generalize – defaults kept</text:span></text:p>
          <text:p text:style-name="P25"><text:span text:style-name="T26">• <text:s/>What matters: operators + runtime-normalized adaptivity, not fine-tuned constan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9.797cm" svg:height="11.136cm" svg:x="0.601cm" svg:y="2.257cm" draw:page-number="9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ank">
        <draw:custom-shape draw:name="Rectangle 1" draw:style-name="gr4" draw:text-style-name="P5" draw:layer="layout" svg:width="0.355cm" svg:height="1.574cm" svg:x="1.397cm" svg:y="1.067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" draw:style-name="gr43" draw:text-style-name="P4" draw:layer="layout" svg:width="29.463cm" svg:height="2.285cm" svg:x="2.159cm" svg:y="0.813cm">
          <text:p text:style-name="P3"><text:span text:style-name="T5">Overall performance (official 30 s budget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" draw:style-name="gr44" draw:text-style-name="P4" draw:layer="layout" svg:width="1.777cm" svg:height="1.015cm" svg:x="31.75cm" svg:y="17.653cm">
          <text:p text:style-name="P3"><text:span text:style-name="T6">1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" draw:style-name="gr9" draw:text-style-name="P10" draw:layer="layout" svg:width="20.573cm" svg:height="9.95cm" svg:x="1.397cm" svg:y="4.064cm">
          <draw:image xlink:href="Pictures/100000010000076C000003971B9EEDD0.png" xlink:type="simple" xlink:show="embed" xlink:actuate="onLoad" draw:mime-type="image/png">
            <text:p/>
          </draw:image>
          <svg:desc>fig_results.png</svg:desc>
        </draw:frame>
        <draw:custom-shape draw:name="TextBox 5" draw:style-name="gr45" draw:text-style-name="P9" draw:layer="layout" svg:width="10.159cm" svg:height="13.715cm" svg:x="22.733cm" svg:y="4.572cm">
          <text:p text:style-name="P7"><text:span text:style-name="T23">• <text:s/>Avg. 63.3 % of UB (55–73 %)</text:span></text:p>
          <text:p text:style-name="P7"><text:span text:style-name="T22">• <text:s/>Total profit 323,172</text:span></text:p>
          <text:p text:style-name="P7"><text:span text:style-name="T22">• <text:s/>All 20 solutions checker-verified</text:span></text:p>
          <text:p text:style-name="P19"><text:span text:style-name="T22">• <text:s/>10 seeds × 20 instances:</text:span></text:p>
          <text:p text:style-name="P19"><text:span text:style-name="T4"><text:s text:c="4"/>– <text:s/>CV 0.2–1.5 % per instance</text:span></text:p>
          <text:p text:style-name="P7"><text:span text:style-name="T4"><text:s text:c="4"/>– <text:s/>total 322,599 ± 1,057</text:span></text:p>
          <text:p text:style-name="P19"><text:span text:style-name="T22">• <text:s/>%UB spread mostly reflects bound loosenes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9.797cm" svg:height="11.136cm" svg:x="0.601cm" svg:y="2.257cm" draw:page-number="10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ank">
        <draw:custom-shape draw:name="Rectangle 1" draw:style-name="gr4" draw:text-style-name="P5" draw:layer="layout" svg:width="0.355cm" svg:height="1.574cm" svg:x="1.397cm" svg:y="1.067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" draw:style-name="gr46" draw:text-style-name="P4" draw:layer="layout" svg:width="29.463cm" svg:height="2.285cm" svg:x="2.159cm" svg:y="0.813cm">
          <text:p text:style-name="P3"><text:span text:style-name="T5">Is 30 s enough? Convergence over 600 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" draw:style-name="gr47" draw:text-style-name="P4" draw:layer="layout" svg:width="1.777cm" svg:height="1.015cm" svg:x="31.75cm" svg:y="17.653cm">
          <text:p text:style-name="P3"><text:span text:style-name="T6">1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" draw:style-name="gr9" draw:text-style-name="P10" draw:layer="layout" svg:width="19.303cm" svg:height="11.222cm" svg:x="1.397cm" svg:y="3.81cm">
          <draw:image xlink:href="Pictures/10000001000006B8000003E8A3FC7F8F.png" xlink:type="simple" xlink:show="embed" xlink:actuate="onLoad" draw:mime-type="image/png">
            <text:p/>
          </draw:image>
          <svg:desc>fig_convergence.png</svg:desc>
        </draw:frame>
        <draw:custom-shape draw:name="TextBox 5" draw:style-name="gr48" draw:text-style-name="P9" draw:layer="layout" svg:width="11.556cm" svg:height="13.715cm" svg:x="21.209cm" svg:y="4.318cm">
          <text:p text:style-name="P7"><text:span text:style-name="T23">• <text:s/>30 s captures 97.8 % of the 600 s quality</text:span></text:p>
          <text:p text:style-name="P7"><text:span text:style-name="T22">• <text:s/>Time-based cooling compresses the schedule into any budget</text:span></text:p>
          <text:p text:style-name="P7"><text:span text:style-name="T22">• <text:s/>n ≤ 350 converge in 1–5 min</text:span></text:p>
          <text:p text:style-name="P7"><text:span text:style-name="T24">• <text:s/>n ≥ 750 still improve in the final minute → budget-bound, not converged</text:span></text:p>
          <text:p text:style-name="P7"><text:span text:style-name="T22">• <text:s/>Extra 570 s buy +2.2 pp of UB, mostly on large instanc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9.797cm" svg:height="11.136cm" svg:x="0.601cm" svg:y="2.257cm" draw:page-number="1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ank">
        <draw:custom-shape draw:name="Rectangle 1" draw:style-name="gr4" draw:text-style-name="P5" draw:layer="layout" svg:width="0.355cm" svg:height="1.574cm" svg:x="1.397cm" svg:y="1.067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" draw:style-name="gr49" draw:text-style-name="P4" draw:layer="layout" svg:width="29.463cm" svg:height="2.285cm" svg:x="2.159cm" svg:y="0.813cm">
          <text:p text:style-name="P3"><text:span text:style-name="T5">Takeaway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" draw:style-name="gr50" draw:text-style-name="P4" draw:layer="layout" svg:width="1.777cm" svg:height="1.015cm" svg:x="31.75cm" svg:y="17.653cm">
          <text:p text:style-name="P3"><text:span text:style-name="T6">1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51" draw:text-style-name="P31" draw:layer="layout" svg:width="30.225cm" svg:height="13.715cm" svg:x="2.159cm" svg:y="3.81cm">
          <text:p text:style-name="P30"><text:span text:style-name="T25">• <text:s/>ALNS was the right fit: selection handled natively, one configuration across n = 50…1000</text:span></text:p>
          <text:p text:style-name="P30"><text:span text:style-name="T25">• <text:s/>Fix the yardstick first – the cheap UB made every design decision measurable</text:span></text:p>
          <text:p text:style-name="P30"><text:span text:style-name="T25">• <text:s/>Throughput before operator richness – constant-time insertion tests beat any single operator</text:span></text:p>
          <text:p text:style-name="P30"><text:span text:style-name="T25">• <text:s/>Measure instead of argue – ablation, parameter grid, 10-seed variation</text:span></text:p>
          <text:p text:style-name="P3"><text:span text:style-name="T25"/></text:p>
          <text:p text:style-name="P25"><text:span text:style-name="T26">• <text:s/>What distinguishes our ALNS:</text:span></text:p>
          <text:p text:style-name="P19"><text:span text:style-name="T28"><text:s text:c="4"/>– <text:s/>runtime-normalized adaptive weights + time-based cooling</text:span></text:p>
          <text:p text:style-name="P11"><text:span text:style-name="T28"><text:s text:c="4"/>– <text:s/>→ the wall-clock budget itself is the controlling parameter</text:span></text:p>
          <text:p text:style-name="P3"><text:span text:style-name="T4">Future work: string removals (SISR) · time-aware insertion scoring · set-covering post-optimiz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2" draw:layer="layout" svg:width="33.865cm" svg:height="0.71cm" svg:x="0cm" svg:y="18.339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9.797cm" svg:height="11.136cm" svg:x="0.601cm" svg:y="2.257cm" draw:page-number="1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lank">
        <draw:custom-shape draw:name="Rectangle 1" draw:style-name="gr52" draw:text-style-name="P32" draw:layer="layout" svg:width="33.865cm" svg:height="3.809cm" svg:x="0cm" svg:y="7.62cm">
          <text:p text:style-name="P28"><text:span text:style-name="T29">Backup: Pseudocod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9.797cm" svg:height="11.136cm" svg:x="0.601cm" svg:y="2.257cm" draw:page-number="1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lank">
        <draw:custom-shape draw:name="Rectangle 1" draw:style-name="gr4" draw:text-style-name="P5" draw:layer="layout" svg:width="0.355cm" svg:height="1.574cm" svg:x="1.397cm" svg:y="1.067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" draw:style-name="gr53" draw:text-style-name="P4" draw:layer="layout" svg:width="29.463cm" svg:height="2.285cm" svg:x="2.159cm" svg:y="0.813cm">
          <text:p text:style-name="P3"><text:span text:style-name="T5">Algorithm 1: ALNS main loop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3" draw:style-name="gr54" draw:text-style-name="P23" draw:layer="layout" svg:width="29.463cm" svg:height="11.683cm" svg:x="2.159cm" svg:y="3.81cm">
          <text:p text:style-name="P22"><text:span text:style-name="T15">x = current solution · x* = best feasible solution found</text:span></text:p>
          <text:p text:style-name="P20"><text:span text:style-name="T16">x ← greedy construction; <text:s/>x* ← x; <text:s/>T ← T₀</text:span></text:p>
          <text:p text:style-name="P20"><text:span text:style-name="T16">while wall-clock time remains do</text:span></text:p>
          <text:p text:style-name="P20"><text:span text:style-name="T16"><text:s text:c="4"/>choose destroy d and repair r by roulette wheel over weights w</text:span></text:p>
          <text:p text:style-name="P20"><text:span text:style-name="T16"><text:s text:c="4"/>x' ← r(d(x)) <text:s text:c="9"/>(remove q customers, reinsert removed + sampled unserved)</text:span></text:p>
          <text:p text:style-name="P20"><text:span text:style-name="T16"><text:s text:c="4"/>if exp((f(x') − f(x))/T) &gt; u ~ U(0,1) then x ← x' <text:s text:c="5"/>(penalized score f)</text:span></text:p>
          <text:p text:style-name="P20"><text:span text:style-name="T16"><text:s text:c="4"/>if x' feasible and profit(x') &gt; profit(x*) then x* ← x'</text:span></text:p>
          <text:p text:style-name="P20"><text:span text:style-name="T16"><text:s text:c="4"/>credit d and r with score σ ∈ {25, 10, 3, 0}; <text:s/>record their runtime</text:span></text:p>
          <text:p text:style-name="P20"><text:span text:style-name="T16"><text:s text:c="4"/>every L iterations: <text:s/>w ← (1−ρ)·w + ρ · σ̄ / (1 + (t̄/τ)^α)</text:span></text:p>
          <text:p text:style-name="P20"><text:span text:style-name="T16"><text:s text:c="4"/>update T on the exponential wall-clock schedule T₀ → T_min</text:span></text:p>
          <text:p text:style-name="P20"><text:span text:style-name="T16"><text:s text:c="4"/>if 500 consecutive rejections then x ← randomized greedy; <text:s/>T ← max(T, 0.75·T₀)</text:span></text:p>
          <text:p text:style-name="P20"><text:span text:style-name="T16">return x*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TextBox 4" draw:style-name="gr55" draw:text-style-name="P4" draw:layer="layout" svg:width="29.971cm" svg:height="1.269cm" svg:x="2.159cm" svg:y="17.399cm">
          <text:p text:style-name="P3"><text:span text:style-name="T8">f = profit − infeasibility penalties · σ̄, t̄ = mean score/runtime per segment · L = segment length, ρ = reaction facto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9.797cm" svg:height="11.136cm" svg:x="0.601cm" svg:y="2.257cm" draw:page-number="14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Blank">
        <draw:custom-shape draw:name="Rectangle 1" draw:style-name="gr4" draw:text-style-name="P5" draw:layer="layout" svg:width="0.355cm" svg:height="1.574cm" svg:x="1.397cm" svg:y="1.067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" draw:style-name="gr56" draw:text-style-name="P4" draw:layer="layout" svg:width="29.463cm" svg:height="2.285cm" svg:x="2.159cm" svg:y="0.813cm">
          <text:p text:style-name="P3"><text:span text:style-name="T5">Algorithm 3: greedy construc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3" draw:style-name="gr57" draw:text-style-name="P23" draw:layer="layout" svg:width="29.463cm" svg:height="10.667cm" svg:x="2.159cm" svg:y="3.81cm">
          <text:p text:style-name="P22"><text:span text:style-name="T30">Also used with shuffled order for restarts</text:span></text:p>
          <text:p text:style-name="P20"><text:span text:style-name="T31">x ← empty plan (all couriers idle, all customers unserved)</text:span></text:p>
          <text:p text:style-name="P20"><text:span text:style-name="T31">O ← customers with ≥ 1 compatible courier, sorted by decreasing profit</text:span></text:p>
          <text:p text:style-name="P20"><text:span text:style-name="T31">for i ∈ O do</text:span></text:p>
          <text:p text:style-name="P20"><text:span text:style-name="T31"><text:s text:c="4"/>best ← ∅</text:span></text:p>
          <text:p text:style-name="P20"><text:span text:style-name="T31"><text:s text:c="4"/>for courier k with Q_i ⊆ S_k, position j in route of k do</text:span></text:p>
          <text:p text:style-name="P20"><text:span text:style-name="T31"><text:s text:c="8"/>if inserting i at (k, j) keeps time windows, shift and return feasible</text:span></text:p>
          <text:p text:style-name="P20"><text:span text:style-name="T31"><text:s text:c="8"/>and travel-time increase &lt; that of best then best ← (k, j)</text:span></text:p>
          <text:p text:style-name="P20"><text:span text:style-name="T31"><text:s text:c="4"/>if best ≠ ∅ then insert i at best <text:s text:c="5"/>(else leave i unserved)</text:span></text:p>
          <text:p text:style-name="P20"><text:span text:style-name="T31">return x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TextBox 4" draw:style-name="gr58" draw:text-style-name="P4" draw:layer="layout" svg:width="29.971cm" svg:height="1.269cm" svg:x="2.159cm" svg:y="17.399cm">
          <text:p text:style-name="P3"><text:span text:style-name="T8">Feasibility checked before every insertion → the plan is feasible at every step; worst case = empty (feasible) pla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9.797cm" svg:height="11.136cm" svg:x="0.601cm" svg:y="2.257cm" draw:page-number="15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Blank">
        <draw:custom-shape draw:name="Rectangle 1" draw:style-name="gr4" draw:text-style-name="P5" draw:layer="layout" svg:width="0.355cm" svg:height="1.574cm" svg:x="1.397cm" svg:y="1.067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" draw:style-name="gr59" draw:text-style-name="P4" draw:layer="layout" svg:width="29.463cm" svg:height="2.285cm" svg:x="2.159cm" svg:y="0.813cm">
          <text:p text:style-name="P3"><text:span text:style-name="T5">Algorithm 4: shared destroy machiner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3" draw:style-name="gr60" draw:text-style-name="P23" draw:layer="layout" svg:width="29.463cm" svg:height="12.191cm" svg:x="2.159cm" svg:y="3.81cm">
          <text:p text:style-name="P22"><text:span text:style-name="T30">Used by all destroy operators</text:span></text:p>
          <text:p text:style-name="P20"><text:span text:style-name="T31">function removalSize(x):</text:span></text:p>
          <text:p text:style-name="P20"><text:span text:style-name="T31"><text:s text:c="4"/>f ← uniform sample from operator fraction range [f_min, f_max]</text:span></text:p>
          <text:p text:style-name="P20"><text:span text:style-name="T31"><text:s text:c="4"/>return q = min( max(1, round(f·|served|)), <text:s/>min(100, 0.25·n), <text:s/>|served| )</text:span></text:p>
          <text:p text:style-name="P20"><text:span text:style-name="T31"/></text:p>
          <text:p text:style-name="P20"><text:span text:style-name="T31">function biasedPick(sorted pool P, bias β): <text:s text:c="4"/>(worst / most related first)</text:span></text:p>
          <text:p text:style-name="P20"><text:span text:style-name="T31"><text:s text:c="4"/>return and remove P[ ⌊rand()^β · |P|⌋ ]</text:span></text:p>
          <text:p text:style-name="P20"><text:span text:style-name="T31"/></text:p>
          <text:p text:style-name="P20"><text:span text:style-name="T31">function finishDestroy(removed set R):</text:span></text:p>
          <text:p text:style-name="P20"><text:span text:style-name="T31"><text:s text:c="4"/>remove every c ∈ R from its route, mark unserved, record origin</text:span></text:p>
          <text:p text:style-name="P20"><text:span text:style-name="T31"><text:s text:c="4"/>rebuild route caches of all affected couriers</text:span></text:p>
          <text:p text:style-name="P20"><text:span text:style-name="T31"><text:s text:c="4"/>return partial solution + R as candidate pool for the repair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TextBox 4" draw:style-name="gr61" draw:text-style-name="P4" draw:layer="layout" svg:width="29.971cm" svg:height="1.269cm" svg:x="2.159cm" svg:y="17.399cm">
          <text:p text:style-name="P3"><text:span text:style-name="T8">β &gt; 1 concentrates picks near the front of the ranking without being deterministic (Shaw randomization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9.797cm" svg:height="11.136cm" svg:x="0.601cm" svg:y="2.257cm" draw:page-number="16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Blank">
        <draw:custom-shape draw:name="Rectangle 1" draw:style-name="gr4" draw:text-style-name="P5" draw:layer="layout" svg:width="0.355cm" svg:height="1.574cm" svg:x="1.397cm" svg:y="1.067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" draw:style-name="gr62" draw:text-style-name="P4" draw:layer="layout" svg:width="29.463cm" svg:height="2.285cm" svg:x="2.159cm" svg:y="0.813cm">
          <text:p text:style-name="P3"><text:span text:style-name="T5">Algorithm 5: ranking-based removal (7 operators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3" draw:style-name="gr63" draw:text-style-name="P23" draw:layer="layout" svg:width="11.683cm" svg:height="8.635cm" svg:x="2.159cm" svg:y="3.81cm">
          <text:p text:style-name="P22"><text:span text:style-name="T32">Skeleton</text:span></text:p>
          <text:p text:style-name="P20"><text:span text:style-name="T33">q ← removalSize(x)</text:span></text:p>
          <text:p text:style-name="P20"><text:span text:style-name="T33">P ← served customers sorted by</text:span></text:p>
          <text:p text:style-name="P20"><text:span text:style-name="T33"><text:s text:c="4"/>criterion (worst first)</text:span></text:p>
          <text:p text:style-name="P20"><text:span text:style-name="T33">repeat q times:</text:span></text:p>
          <text:p text:style-name="P20"><text:span text:style-name="T33"><text:s text:c="4"/>R ← R ∪ biasedPick(P, β)</text:span></text:p>
          <text:p text:style-name="P20"><text:span text:style-name="T33">return finishDestroy(R)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Rounded Rectangle 4" draw:style-name="gr64" draw:text-style-name="P23" draw:layer="layout" svg:width="18.033cm" svg:height="9.905cm" svg:x="14.478cm" svg:y="3.81cm">
          <text:p text:style-name="P22"><text:span text:style-name="T34">Criteria (rank ascending)</text:span></text:p>
          <text:p text:style-name="P20"><text:span text:style-name="T35">random <text:s text:c="9"/>uniform sample, no criterion</text:span></text:p>
          <text:p text:style-name="P20"><text:span text:style-name="T35">worst density <text:s text:c="2"/>static profit / (min travel+service) + noise, top-q</text:span></text:p>
          <text:p text:style-name="P20"><text:span text:style-name="T35">skill scarcity <text:s/>profit_c / (1 + demand on c's courier), top-q</text:span></text:p>
          <text:p text:style-name="P20"><text:span text:style-name="T35">worst detour <text:s text:c="3"/>profit_c / (max(δ_c,0)+1), β = 4</text:span></text:p>
          <text:p text:style-name="P20"><text:span text:style-name="T35">worst detour v2 same ratio · noise in [0.95, 1.05], β = 3</text:span></text:p>
          <text:p text:style-name="P20"><text:span text:style-name="T35">largest saving <text:s/>detour δ_c alone, profit ignored, β = 3</text:span></text:p>
          <text:p text:style-name="P20"><text:span text:style-name="T35">history-based <text:s text:c="2"/>gap δ_c − δ_c^best (best seen this run), β = 3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TextBox 5" draw:style-name="gr65" draw:text-style-name="P4" draw:layer="layout" svg:width="29.971cm" svg:height="1.269cm" svg:x="2.159cm" svg:y="17.399cm">
          <text:p text:style-name="P3"><text:span text:style-name="T8">δ_c = d(prev,c) + d(c,next) − d(prev,next) at the current position of 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9.797cm" svg:height="11.136cm" svg:x="0.601cm" svg:y="2.257cm" draw:page-number="17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Blank">
        <draw:custom-shape draw:name="Rectangle 1" draw:style-name="gr4" draw:text-style-name="P5" draw:layer="layout" svg:width="0.355cm" svg:height="1.574cm" svg:x="1.397cm" svg:y="1.067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" draw:style-name="gr66" draw:text-style-name="P4" draw:layer="layout" svg:width="29.463cm" svg:height="2.285cm" svg:x="2.159cm" svg:y="0.813cm">
          <text:p text:style-name="P3"><text:span text:style-name="T5">Algorithm 6: seed-growth removal (4 operators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3" draw:style-name="gr67" draw:text-style-name="P23" draw:layer="layout" svg:width="11.683cm" svg:height="9.651cm" svg:x="2.159cm" svg:y="3.81cm">
          <text:p text:style-name="P22"><text:span text:style-name="T32">Skeleton</text:span></text:p>
          <text:p text:style-name="P20"><text:span text:style-name="T33">q ← removalSize(x)</text:span></text:p>
          <text:p text:style-name="P20"><text:span text:style-name="T33">R ← {random served seed}</text:span></text:p>
          <text:p text:style-name="P20"><text:span text:style-name="T33">while |R| &lt; q do</text:span></text:p>
          <text:p text:style-name="P20"><text:span text:style-name="T33"><text:s text:c="4"/>s ← random element of R</text:span></text:p>
          <text:p text:style-name="P20"><text:span text:style-name="T33"><text:s text:c="4"/>P ← ≤ 100 nearest served neighbors</text:span></text:p>
          <text:p text:style-name="P20"><text:span text:style-name="T33"><text:s text:c="8"/>of s, sorted by r(s,·)</text:span></text:p>
          <text:p text:style-name="P20"><text:span text:style-name="T33"><text:s text:c="4"/>R ← R ∪ biasedPick(P, β=4)</text:span></text:p>
          <text:p text:style-name="P20"><text:span text:style-name="T33">return finishDestroy(R)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Rounded Rectangle 4" draw:style-name="gr68" draw:text-style-name="P23" draw:layer="layout" svg:width="18.033cm" svg:height="10.667cm" svg:x="14.478cm" svg:y="3.81cm">
          <text:p text:style-name="P22"><text:span text:style-name="T36">Relatedness r(i,j) <text:s/>(smaller = more related)</text:span></text:p>
          <text:p text:style-name="P20"><text:span text:style-name="T37">related <text:s text:c="7"/>d̂(i,j) <text:s/>(distance only)</text:span></text:p>
          <text:p text:style-name="P20"><text:span text:style-name="T37">Shaw <text:s text:c="10"/>0.5·d̂ + 0.25·t̂_ready + 0.25·(1−J)</text:span></text:p>
          <text:p text:style-name="P20"><text:span text:style-name="T37">time-only Shaw t̂_ready alone</text:span></text:p>
          <text:p text:style-name="P20"><text:span text:style-name="T37">temporal Shaw <text:s/>0.5·d̂ + 0.25·t̂_service + 0.25·(1−J)</text:span></text:p>
          <text:p text:style-name="P20"><text:span text:style-name="T37"/></text:p>
          <text:p text:style-name="P20"><text:span text:style-name="T37">d̂ = distance / max distance</text:span></text:p>
          <text:p text:style-name="P20"><text:span text:style-name="T37">t̂ = time difference / planning horizon</text:span></text:p>
          <text:p text:style-name="P20"><text:span text:style-name="T37">J = Jaccard similarity of required skill sets</text:span></text:p>
          <text:p text:style-name="P20"><text:span text:style-name="T37">t̂_service uses CURRENT service-begin times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presentation:notes draw:style-name="dp2">
          <draw:page-thumbnail draw:style-name="gr5" draw:layer="layout" svg:width="19.797cm" svg:height="11.136cm" svg:x="0.601cm" svg:y="2.257cm" draw:page-number="18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Blank">
        <draw:custom-shape draw:name="Rectangle 1" draw:style-name="gr4" draw:text-style-name="P5" draw:layer="layout" svg:width="0.355cm" svg:height="1.574cm" svg:x="1.397cm" svg:y="1.067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" draw:style-name="gr69" draw:text-style-name="P4" draw:layer="layout" svg:width="29.463cm" svg:height="2.285cm" svg:x="2.159cm" svg:y="0.813cm">
          <text:p text:style-name="P3"><text:span text:style-name="T5">Algorithm 7: structural removal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3" draw:style-name="gr70" draw:text-style-name="P23" draw:layer="layout" svg:width="29.463cm" svg:height="12.699cm" svg:x="2.159cm" svg:y="3.81cm">
          <text:p text:style-name="P22"><text:span text:style-name="T32">route / sequence / time-window segment</text:span></text:p>
          <text:p text:style-name="P20"><text:span text:style-name="T33">route removal:</text:span></text:p>
          <text:p text:style-name="P20"><text:span text:style-name="T33"><text:s text:c="4"/>P ← non-empty routes sorted by profit per used shift time (worst first)</text:span></text:p>
          <text:p text:style-name="P20"><text:span text:style-name="T33"><text:s text:c="4"/>repeat 1–2 times: empty route biasedPick(P, β=3), add customers to R</text:span></text:p>
          <text:p text:style-name="P20"><text:span text:style-name="T33"/></text:p>
          <text:p text:style-name="P20"><text:span text:style-name="T33">sequence removal:</text:span></text:p>
          <text:p text:style-name="P20"><text:span text:style-name="T33"><text:s text:c="4"/>q ← removalSize(x)</text:span></text:p>
          <text:p text:style-name="P20"><text:span text:style-name="T33"><text:s text:c="4"/>for routes in random order, until |R| = q:</text:span></text:p>
          <text:p text:style-name="P20"><text:span text:style-name="T33"><text:s text:c="8"/>add a random contiguous segment of the route</text:span></text:p>
          <text:p text:style-name="P20"><text:span text:style-name="T33"/></text:p>
          <text:p text:style-name="P20"><text:span text:style-name="T33">time-window segment removal:</text:span></text:p>
          <text:p text:style-name="P20"><text:span text:style-name="T33"><text:s text:c="4"/>center a window of width 0.15·horizon at a random service start</text:span></text:p>
          <text:p text:style-name="P20"><text:span text:style-name="T33"><text:s text:c="4"/>R ← customers whose cached service start falls inside the window</text:span></text:p>
          <text:p text:style-name="P20"><text:span text:style-name="T33"><text:s text:c="4"/>if |R| &gt; q_max then R ← uniform sample of size q_max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presentation:notes draw:style-name="dp2">
          <draw:page-thumbnail draw:style-name="gr5" draw:layer="layout" svg:width="19.797cm" svg:height="11.136cm" svg:x="0.601cm" svg:y="2.257cm" draw:page-number="19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Blank">
        <draw:custom-shape draw:name="Rectangle 1" draw:style-name="gr4" draw:text-style-name="P5" draw:layer="layout" svg:width="0.355cm" svg:height="1.574cm" svg:x="1.397cm" svg:y="1.067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" draw:style-name="gr71" draw:text-style-name="P4" draw:layer="layout" svg:width="29.463cm" svg:height="2.285cm" svg:x="2.159cm" svg:y="0.813cm">
          <text:p text:style-name="P3"><text:span text:style-name="T5">Algorithm 8: cluster removal (Kovacs et al. 2012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3" draw:style-name="gr72" draw:text-style-name="P23" draw:layer="layout" svg:width="29.463cm" svg:height="9.905cm" svg:x="2.159cm" svg:y="3.81cm">
          <text:p text:style-name="P22"><text:span text:style-name="T30">MST split + route hopping</text:span></text:p>
          <text:p text:style-name="P20"><text:span text:style-name="T31">q ← removalSize(x); <text:s/>v ← random route with ≥ 3 customers <text:s text:c="2"/>(none: uniform sample)</text:span></text:p>
          <text:p text:style-name="P20"><text:span text:style-name="T31">while |R| &lt; q do</text:span></text:p>
          <text:p text:style-name="P20"><text:span text:style-name="T31"><text:s text:c="4"/>build minimum spanning tree over remaining customers of v</text:span></text:p>
          <text:p text:style-name="P20"><text:span text:style-name="T31"><text:s text:c="4"/>drop its longest edge → two clusters</text:span></text:p>
          <text:p text:style-name="P20"><text:span text:style-name="T31"><text:s text:c="4"/>add one of the two clusters (coin flip) to R</text:span></text:p>
          <text:p text:style-name="P20"><text:span text:style-name="T31"><text:s text:c="4"/>v ← route of the nearest still-served neighbor of a random removed customer</text:span></text:p>
          <text:p text:style-name="P20"><text:span text:style-name="T31"><text:s text:c="4"/>if no such splittable route exists then break</text:span></text:p>
          <text:p text:style-name="P20"><text:span text:style-name="T31">return finishDestroy(R)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TextBox 4" draw:style-name="gr73" draw:text-style-name="P4" draw:layer="layout" svg:width="29.971cm" svg:height="1.269cm" svg:x="2.159cm" svg:y="17.399cm">
          <text:p text:style-name="P3"><text:span text:style-name="T8">Removes spatially coherent blocks per route – breaks up geographic mis-assignments between courier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9.797cm" svg:height="11.136cm" svg:x="0.601cm" svg:y="2.257cm" draw:page-number="20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Blank">
        <draw:custom-shape draw:name="Rectangle 1" draw:style-name="gr4" draw:text-style-name="P5" draw:layer="layout" svg:width="0.355cm" svg:height="1.574cm" svg:x="1.397cm" svg:y="1.067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" draw:style-name="gr74" draw:text-style-name="P4" draw:layer="layout" svg:width="29.463cm" svg:height="2.285cm" svg:x="2.159cm" svg:y="0.813cm">
          <text:p text:style-name="P3"><text:span text:style-name="T5">Algorithm 9: shared repair machiner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3" draw:style-name="gr75" draw:text-style-name="P23" draw:layer="layout" svg:width="29.463cm" svg:height="12.699cm" svg:x="2.159cm" svg:y="3.81cm">
          <text:p text:style-name="P22"><text:span text:style-name="T30">Used by all repair operators</text:span></text:p>
          <text:p text:style-name="P20"><text:span text:style-name="T31">function candidatePool(removed R):</text:span></text:p>
          <text:p text:style-name="P20"><text:span text:style-name="T31"><text:s text:c="4"/>C ← R (still unserved) ∪ up to 40 extra unserved customers,</text:span></text:p>
          <text:p text:style-name="P20"><text:span text:style-name="T31"><text:s text:c="8"/>half best by static profit density, half a uniform sample</text:span></text:p>
          <text:p text:style-name="P20"><text:span text:style-name="T31"><text:s text:c="4"/>return C</text:span></text:p>
          <text:p text:style-name="P20"><text:span text:style-name="T31"/></text:p>
          <text:p text:style-name="P20"><text:span text:style-name="T31">function best(c): <text:s text:c="7"/>(uses the cached time slacks, Algorithm 2)</text:span></text:p>
          <text:p text:style-name="P20"><text:span text:style-name="T31"><text:s text:c="4"/>over all compatible couriers k and positions j:</text:span></text:p>
          <text:p text:style-name="P20"><text:span text:style-name="T31"><text:s text:c="8"/>evaluate Δ(c,k,j) = profit_c − penalty increase</text:span></text:p>
          <text:p text:style-name="P20"><text:span text:style-name="T31"><text:s text:c="4"/>return move maximizing Δ, ties broken by smaller travel delta</text:span></text:p>
          <text:p text:style-name="P20"><text:span text:style-name="T31"/></text:p>
          <text:p text:style-name="P20"><text:span text:style-name="T31">function applyMove(m):</text:span></text:p>
          <text:p text:style-name="P20"><text:span text:style-name="T31"><text:s text:c="4"/>insert, rebuild cache of the changed route, rescan only that courier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presentation:notes draw:style-name="dp2">
          <draw:page-thumbnail draw:style-name="gr5" draw:layer="layout" svg:width="19.797cm" svg:height="11.136cm" svg:x="0.601cm" svg:y="2.257cm" draw:page-number="2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Blank">
        <draw:custom-shape draw:name="Rectangle 1" draw:style-name="gr4" draw:text-style-name="P5" draw:layer="layout" svg:width="0.355cm" svg:height="1.574cm" svg:x="1.397cm" svg:y="1.067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" draw:style-name="gr76" draw:text-style-name="P4" draw:layer="layout" svg:width="29.463cm" svg:height="2.285cm" svg:x="2.159cm" svg:y="0.813cm">
          <text:p text:style-name="P3"><text:span text:style-name="T5">Algorithm 10: best-first repair (4 operators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3" draw:style-name="gr77" draw:text-style-name="P23" draw:layer="layout" svg:width="11.683cm" svg:height="10.159cm" svg:x="2.159cm" svg:y="3.81cm">
          <text:p text:style-name="P22"><text:span text:style-name="T32">Skeleton</text:span></text:p>
          <text:p text:style-name="P20"><text:span text:style-name="T33">C ← candidatePool(R)</text:span></text:p>
          <text:p text:style-name="P20"><text:span text:style-name="T33">loop</text:span></text:p>
          <text:p text:style-name="P20"><text:span text:style-name="T33"><text:s text:c="4"/>for c ∈ C with best(c) ≠ ∅</text:span></text:p>
          <text:p text:style-name="P20"><text:span text:style-name="T33"><text:s text:c="4"/>and Δ &gt; 0:</text:span></text:p>
          <text:p text:style-name="P20"><text:span text:style-name="T33"><text:s text:c="8"/>compute selection key of c</text:span></text:p>
          <text:p text:style-name="P20"><text:span text:style-name="T33"><text:s text:c="4"/>if no such c then break</text:span></text:p>
          <text:p text:style-name="P20"><text:span text:style-name="T33"><text:s text:c="4"/>applyMove(best move of best key)</text:span></text:p>
          <text:p text:style-name="P20"><text:span text:style-name="T33"><text:s text:c="4"/>C ← C \ {c}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Rounded Rectangle 4" draw:style-name="gr78" draw:text-style-name="P23" draw:layer="layout" svg:width="18.033cm" svg:height="10.667cm" svg:x="14.478cm" svg:y="3.81cm">
          <text:p text:style-name="P22"><text:span text:style-name="T36">Selection keys</text:span></text:p>
          <text:p text:style-name="P20"><text:span text:style-name="T37">greedy best <text:s text:c="4"/>largest Δ</text:span></text:p>
          <text:p text:style-name="P20"><text:span text:style-name="T37">noisy greedy <text:s text:c="3"/>largest Δ/(1+max(0,travel delta))</text:span></text:p>
          <text:p text:style-name="P20"><text:span text:style-name="T37"><text:s text:c="16"/>· noise in [0.85, 1.15]</text:span></text:p>
          <text:p text:style-name="P20"><text:span text:style-name="T37">regret-2 <text:s text:c="7"/>largest Δ₁ − Δ₂ over the two best</text:span></text:p>
          <text:p text:style-name="P20"><text:span text:style-name="T37"><text:s text:c="16"/>POSITIONS (+ urgency bonus if only one)</text:span></text:p>
          <text:p text:style-name="P20"><text:span text:style-name="T37">regret-3 <text:s text:c="7"/>largest Σ(travelᵢ − travel₁) over best</text:span></text:p>
          <text:p text:style-name="P20"><text:span text:style-name="T37"><text:s text:c="2"/>(couriers) <text:s text:c="3"/>insertions on 3 DISTINCT couriers</text:span></text:p>
          <text:p text:style-name="P20"><text:span text:style-name="T37"><text:s text:c="16"/>(+ bonus per missing courier)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presentation:notes draw:style-name="dp2">
          <draw:page-thumbnail draw:style-name="gr5" draw:layer="layout" svg:width="19.797cm" svg:height="11.136cm" svg:x="0.601cm" svg:y="2.257cm" draw:page-number="2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Blank">
        <draw:custom-shape draw:name="Rectangle 1" draw:style-name="gr4" draw:text-style-name="P5" draw:layer="layout" svg:width="0.355cm" svg:height="1.574cm" svg:x="1.397cm" svg:y="1.067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" draw:style-name="gr79" draw:text-style-name="P4" draw:layer="layout" svg:width="29.463cm" svg:height="2.285cm" svg:x="2.159cm" svg:y="0.813cm">
          <text:p text:style-name="P3"><text:span text:style-name="T5">Algorithm 11: single-pass repair (5 operators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3" draw:style-name="gr80" draw:text-style-name="P23" draw:layer="layout" svg:width="11.683cm" svg:height="9.651cm" svg:x="2.159cm" svg:y="3.81cm">
          <text:p text:style-name="P22"><text:span text:style-name="T32">Skeleton</text:span></text:p>
          <text:p text:style-name="P20"><text:span text:style-name="T33">C ← candidatePool(R),</text:span></text:p>
          <text:p text:style-name="P20"><text:span text:style-name="T33"><text:s text:c="4"/>ordered by operator rule</text:span></text:p>
          <text:p text:style-name="P20"><text:span text:style-name="T33">for c ∈ C do</text:span></text:p>
          <text:p text:style-name="P20"><text:span text:style-name="T33"><text:s text:c="4"/>m ← best(c) <text:s text:c="2"/>(random-position:</text:span></text:p>
          <text:p text:style-name="P20"><text:span text:style-name="T33"><text:s text:c="8"/>uniform feasible position)</text:span></text:p>
          <text:p text:style-name="P20"><text:span text:style-name="T33"><text:s text:c="4"/>if m ≠ ∅ and Δ(m) &gt; 0 then</text:span></text:p>
          <text:p text:style-name="P20"><text:span text:style-name="T33"><text:s text:c="8"/>applyMove(m)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Rounded Rectangle 4" draw:style-name="gr81" draw:text-style-name="P23" draw:layer="layout" svg:width="18.033cm" svg:height="11.683cm" svg:x="14.478cm" svg:y="3.81cm">
          <text:p text:style-name="P22"><text:span text:style-name="T36">Orderings</text:span></text:p>
          <text:p text:style-name="P20"><text:span text:style-name="T37">sequential profit <text:s text:c="3"/>decreasing profit, ties by</text:span></text:p>
          <text:p text:style-name="P20"><text:span text:style-name="T37"><text:s text:c="21"/>tighter time window</text:span></text:p>
          <text:p text:style-name="P20"><text:span text:style-name="T37">scarce-skill-first <text:s text:c="2"/>fewest compatible couriers,</text:span></text:p>
          <text:p text:style-name="P20"><text:span text:style-name="T37"><text:s text:c="21"/>then profit, profit density</text:span></text:p>
          <text:p text:style-name="P20"><text:span text:style-name="T37">LRFI <text:s text:c="16"/>reverse removal order,</text:span></text:p>
          <text:p text:style-name="P20"><text:span text:style-name="T37"><text:s text:c="21"/>extras afterwards</text:span></text:p>
          <text:p text:style-name="P20"><text:span text:style-name="T37">random position <text:s text:c="5"/>shuffled order, random</text:span></text:p>
          <text:p text:style-name="P20"><text:span text:style-name="T37"><text:s text:c="21"/>feasible position (diversify)</text:span></text:p>
          <text:p text:style-name="P20"><text:span text:style-name="T37">Shaw insertion <text:s text:c="6"/>most related to last inserted</text:span></text:p>
          <text:p text:style-name="P20"><text:span text:style-name="T37"><text:s text:c="21"/>(Shaw measure, β = 4)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presentation:notes draw:style-name="dp2">
          <draw:page-thumbnail draw:style-name="gr5" draw:layer="layout" svg:width="19.797cm" svg:height="11.136cm" svg:x="0.601cm" svg:y="2.257cm" draw:page-number="2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/>
    <style:font-face style:name="Consolas" svg:font-family="Consolas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Unifont" svg:font-family="Unifont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Unifont" style:font-family-asian="Unifont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Unifont" style:font-family-asian="Unifont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 style:writing-mode="lr-tb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Unifont" style:font-family-asian="Unifont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Slide-outline2" style:display-name="Title Slide-outline2" style:family="presentation" style:parent-style-name="Title_20_Slide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3" style:display-name="Title Slide-outline3" style:family="presentation" style:parent-style-name="Title_20_Slide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4" style:display-name="Title Slide-outline4" style:family="presentation" style:parent-style-name="Title_20_Slide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Unifont" style:font-family-asian="Unifont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 style:writing-mode="lr-tb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Unifont" style:font-family-asian="Unifont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background" style:display-name="Title and Vertical Text-background" style:family="presentation">
      <style:graphic-properties draw:stroke="none" draw:fill="solid" draw:fill-color="#ffffff"/>
      <style:text-properties style:letter-kerning="true"/>
    </style:style>
    <style:style style:name="Title_20_and_20_Vertical_20_Text-backgroundobjects" style:display-name="Title and Vertical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Vertical_20_Text-notes" style:display-name="Title and Vertical Tex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Unifont" style:font-family-asian="Unifont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outline1" style:display-name="Title and Vertical Text-outline1" style:family="presentation">
      <style:graphic-properties draw:stroke="none" draw:fill="none" draw:auto-grow-height="false" draw:fit-to-size="false" style:shrink-to-fit="true" style:writing-mode="lr-tb">
        <text:list-style style:name="Title_20_and_20_Vertical_20_Text-outline1" style:display-name="Title and Vertical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Unifont" style:font-family-asian="Unifont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outline2" style:display-name="Title and Vertical Text-outline2" style:family="presentation" style:parent-style-name="Title_20_and_20_Vertical_20_Tex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3" style:display-name="Title and Vertical Text-outline3" style:family="presentation" style:parent-style-name="Title_20_and_20_Vertical_20_Tex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4" style:display-name="Title and Vertical Text-outline4" style:family="presentation" style:parent-style-name="Title_20_and_20_Vertical_20_Tex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5" style:display-name="Title and Vertical Text-outline5" style:family="presentation" style:parent-style-name="Title_20_and_20_Vertical_20_Text-outline4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6" style:display-name="Title and Vertical Text-outline6" style:family="presentation" style:parent-style-name="Title_20_and_20_Vertical_20_Text-outline5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7" style:display-name="Title and Vertical Text-outline7" style:family="presentation" style:parent-style-name="Title_20_and_20_Vertical_20_Text-outline6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8" style:display-name="Title and Vertical Text-outline8" style:family="presentation" style:parent-style-name="Title_20_and_20_Vertical_20_Text-outline7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9" style:display-name="Title and Vertical Text-outline9" style:family="presentation" style:parent-style-name="Title_20_and_20_Vertical_20_Text-outline8">
      <style:paragraph-properties fo:margin-top="0.1cm" fo:margin-bottom="0cm"/>
      <style:text-properties fo:font-size="20pt" style:font-size-asian="20pt" style:font-size-complex="20pt"/>
    </style:style>
    <style:style style:name="Title_20_and_20_Vertical_20_Text-subtitle" style:display-name="Title and Vertical Text-subtitle" style:family="presentation">
      <style:graphic-properties draw:stroke="none" draw:fill="none" draw:textarea-vertical-align="middle">
        <text:list-style style:name="Title_20_and_20_Vertical_20_Text-subtitle" style:display-name="Title and Vertical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Unifont" style:font-family-asian="Unifont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title" style:display-name="Title and Vertical Text-title" style:family="presentation">
      <style:graphic-properties draw:stroke="none" draw:fill="none" draw:textarea-vertical-align="middle" style:writing-mode="lr-tb">
        <text:list-style style:name="Title_20_and_20_Vertical_20_Text-title" style:display-name="Title and Vertical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Unifont" style:font-family-asian="Unifont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background" style:display-name="Vertical Title and Text-background" style:family="presentation">
      <style:graphic-properties draw:stroke="none" draw:fill="solid" draw:fill-color="#ffffff"/>
      <style:text-properties style:letter-kerning="true"/>
    </style:style>
    <style:style style:name="Vertical_20_Title_20_and_20_Text-backgroundobjects" style:display-name="Vertical Title and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ertical_20_Title_20_and_20_Text-notes" style:display-name="Vertical Title and Tex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Unifont" style:font-family-asian="Unifont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outline1" style:display-name="Vertical Title and Text-outline1" style:family="presentation">
      <style:graphic-properties draw:stroke="none" draw:fill="none" draw:auto-grow-height="false" draw:fit-to-size="false" style:shrink-to-fit="true" style:writing-mode="lr-tb">
        <text:list-style style:name="Vertical_20_Title_20_and_20_Text-outline1" style:display-name="Vertical Title and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Unifont" style:font-family-asian="Unifont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outline2" style:display-name="Vertical Title and Text-outline2" style:family="presentation" style:parent-style-name="Vertical_20_Title_20_and_20_Tex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3" style:display-name="Vertical Title and Text-outline3" style:family="presentation" style:parent-style-name="Vertical_20_Title_20_and_20_Tex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4" style:display-name="Vertical Title and Text-outline4" style:family="presentation" style:parent-style-name="Vertical_20_Title_20_and_20_Tex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5" style:display-name="Vertical Title and Text-outline5" style:family="presentation" style:parent-style-name="Vertical_20_Title_20_and_20_Text-outline4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6" style:display-name="Vertical Title and Text-outline6" style:family="presentation" style:parent-style-name="Vertical_20_Title_20_and_20_Text-outline5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7" style:display-name="Vertical Title and Text-outline7" style:family="presentation" style:parent-style-name="Vertical_20_Title_20_and_20_Text-outline6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8" style:display-name="Vertical Title and Text-outline8" style:family="presentation" style:parent-style-name="Vertical_20_Title_20_and_20_Text-outline7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9" style:display-name="Vertical Title and Text-outline9" style:family="presentation" style:parent-style-name="Vertical_20_Title_20_and_20_Text-outline8">
      <style:paragraph-properties fo:margin-top="0.1cm" fo:margin-bottom="0cm"/>
      <style:text-properties fo:font-size="20pt" style:font-size-asian="20pt" style:font-size-complex="20pt"/>
    </style:style>
    <style:style style:name="Vertical_20_Title_20_and_20_Text-subtitle" style:display-name="Vertical Title and Text-subtitle" style:family="presentation">
      <style:graphic-properties draw:stroke="none" draw:fill="none" draw:textarea-vertical-align="middle">
        <text:list-style style:name="Vertical_20_Title_20_and_20_Text-subtitle" style:display-name="Vertical Title and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Unifont" style:font-family-asian="Unifont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title" style:display-name="Vertical Title and Text-title" style:family="presentation">
      <style:graphic-properties draw:stroke="none" draw:fill="none" draw:textarea-vertical-align="middle" style:writing-mode="lr-tb">
        <text:list-style style:name="Vertical_20_Title_20_and_20_Text-title" style:display-name="Vertical Title and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Unifont" style:font-family-asian="Unifont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Unifont" style:font-family-asian="Unifont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 style:writing-mode="lr-tb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Unifont" style:font-family-asian="Unifont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outline2" style:display-name="Title and Content-outline2" style:family="presentation" style:parent-style-name="Title_20_and_20_Conten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3" style:display-name="Title and Content-outline3" style:family="presentation" style:parent-style-name="Title_20_and_20_Conten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4" style:display-name="Title and Content-outline4" style:family="presentation" style:parent-style-name="Title_20_and_20_Conten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Unifont" style:font-family-asian="Unifont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 style:writing-mode="lr-tb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Unifont" style:font-family-asian="Unifont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background" style:display-name="Section Header-background" style:family="presentation">
      <style:graphic-properties draw:stroke="none" draw:fill="solid" draw:fill-color="#ffffff"/>
      <style:text-properties style:letter-kerning="true"/>
    </style:style>
    <style:style style:name="Section_20_Header-backgroundobjects" style:display-name="Section 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Header-notes" style:display-name="Section Header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Unifont" style:font-family-asian="Unifont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Header-outline1" style:display-name="Section Header-outline1" style:family="presentation">
      <style:graphic-properties draw:stroke="none" draw:fill="none" draw:auto-grow-height="false" draw:fit-to-size="false" style:shrink-to-fit="true" style:writing-mode="lr-tb">
        <text:list-style style:name="Section_20_Header-outline1" style:display-name="Section Head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Unifont" style:font-family-asian="Unifont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outline2" style:display-name="Section Header-outline2" style:family="presentation" style:parent-style-name="Section_20_Header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3" style:display-name="Section Header-outline3" style:family="presentation" style:parent-style-name="Section_20_Header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4" style:display-name="Section Header-outline4" style:family="presentation" style:parent-style-name="Section_20_Header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5" style:display-name="Section Header-outline5" style:family="presentation" style:parent-style-name="Section_20_Header-outline4">
      <style:paragraph-properties fo:margin-top="0.1cm" fo:margin-bottom="0cm"/>
      <style:text-properties fo:font-size="20pt" style:font-size-asian="20pt" style:font-size-complex="20pt"/>
    </style:style>
    <style:style style:name="Section_20_Header-outline6" style:display-name="Section Header-outline6" style:family="presentation" style:parent-style-name="Section_20_Header-outline5">
      <style:paragraph-properties fo:margin-top="0.1cm" fo:margin-bottom="0cm"/>
      <style:text-properties fo:font-size="20pt" style:font-size-asian="20pt" style:font-size-complex="20pt"/>
    </style:style>
    <style:style style:name="Section_20_Header-outline7" style:display-name="Section Header-outline7" style:family="presentation" style:parent-style-name="Section_20_Header-outline6">
      <style:paragraph-properties fo:margin-top="0.1cm" fo:margin-bottom="0cm"/>
      <style:text-properties fo:font-size="20pt" style:font-size-asian="20pt" style:font-size-complex="20pt"/>
    </style:style>
    <style:style style:name="Section_20_Header-outline8" style:display-name="Section Header-outline8" style:family="presentation" style:parent-style-name="Section_20_Header-outline7">
      <style:paragraph-properties fo:margin-top="0.1cm" fo:margin-bottom="0cm"/>
      <style:text-properties fo:font-size="20pt" style:font-size-asian="20pt" style:font-size-complex="20pt"/>
    </style:style>
    <style:style style:name="Section_20_Header-outline9" style:display-name="Section Header-outline9" style:family="presentation" style:parent-style-name="Section_20_Header-outline8">
      <style:paragraph-properties fo:margin-top="0.1cm" fo:margin-bottom="0cm"/>
      <style:text-properties fo:font-size="20pt" style:font-size-asian="20pt" style:font-size-complex="20pt"/>
    </style:style>
    <style:style style:name="Section_20_Header-subtitle" style:display-name="Section Header-subtitle" style:family="presentation">
      <style:graphic-properties draw:stroke="none" draw:fill="none" draw:textarea-vertical-align="middle">
        <text:list-style style:name="Section_20_Header-subtitle" style:display-name="Section Hea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Unifont" style:font-family-asian="Unifont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er-title" style:display-name="Section Header-title" style:family="presentation">
      <style:graphic-properties draw:stroke="none" draw:fill="none" draw:textarea-vertical-align="middle" style:writing-mode="lr-tb">
        <text:list-style style:name="Section_20_Header-title" style:display-name="Section Head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Unifont" style:font-family-asian="Unifont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background" style:display-name="Two Content-background" style:family="presentation">
      <style:graphic-properties draw:stroke="none" draw:fill="solid" draw:fill-color="#ffffff"/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Unifont" style:font-family-asian="Unifont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false" style:shrink-to-fit="true" style:writing-mode="lr-tb">
        <text:list-style style:name="Two_20_Content-outline1" style:display-name="Two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Unifont" style:font-family-asian="Unifont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outline2" style:display-name="Two Content-outline2" style:family="presentation" style:parent-style-name="Two_20_Conten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3" style:display-name="Two Content-outline3" style:family="presentation" style:parent-style-name="Two_20_Conten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4" style:display-name="Two Content-outline4" style:family="presentation" style:parent-style-name="Two_20_Conten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5" style:display-name="Two Content-outline5" style:family="presentation" style:parent-style-name="Two_20_Content-outline4">
      <style:paragraph-properties fo:margin-top="0.1cm" fo:margin-bottom="0cm"/>
      <style:text-properties fo:font-size="20pt" style:font-size-asian="20pt" style:font-size-complex="20pt"/>
    </style:style>
    <style:style style:name="Two_20_Content-outline6" style:display-name="Two Content-outline6" style:family="presentation" style:parent-style-name="Two_20_Content-outline5">
      <style:paragraph-properties fo:margin-top="0.1cm" fo:margin-bottom="0cm"/>
      <style:text-properties fo:font-size="20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top="0.1cm" fo:margin-bottom="0cm"/>
      <style:text-properties fo:font-size="20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top="0.1cm" fo:margin-bottom="0cm"/>
      <style:text-properties fo:font-size="20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top="0.1cm" fo:margin-bottom="0cm"/>
      <style:text-properties fo:font-size="20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Unifont" style:font-family-asian="Unifont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 style:writing-mode="lr-tb">
        <text:list-style style:name="Two_20_Content-title" style:display-name="Two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Unifont" style:font-family-asian="Unifont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background" style:family="presentation">
      <style:graphic-properties draw:stroke="none" draw:fill="solid" draw:fill-color="#ffffff"/>
      <style:text-properties style:letter-kerning="true"/>
    </style:style>
    <style:style style:name="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mparison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Unifont" style:font-family-asian="Unifont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mparison-outline1" style:family="presentation">
      <style:graphic-properties draw:stroke="none" draw:fill="none" draw:auto-grow-height="false" draw:fit-to-size="false" style:shrink-to-fit="true" style:writing-mode="lr-tb">
        <text:list-style style:name="Comparis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Unifont" style:font-family-asian="Unifont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outline2" style:family="presentation" style:parent-style-name="Comparis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Comparison-outline3" style:family="presentation" style:parent-style-name="Comparis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Comparison-outline4" style:family="presentation" style:parent-style-name="Comparis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Comparison-outline5" style:family="presentation" style:parent-style-name="Comparison-outline4">
      <style:paragraph-properties fo:margin-top="0.1cm" fo:margin-bottom="0cm"/>
      <style:text-properties fo:font-size="20pt" style:font-size-asian="20pt" style:font-size-complex="20pt"/>
    </style:style>
    <style:style style:name="Comparison-outline6" style:family="presentation" style:parent-style-name="Comparison-outline5">
      <style:paragraph-properties fo:margin-top="0.1cm" fo:margin-bottom="0cm"/>
      <style:text-properties fo:font-size="20pt" style:font-size-asian="20pt" style:font-size-complex="20pt"/>
    </style:style>
    <style:style style:name="Comparison-outline7" style:family="presentation" style:parent-style-name="Comparison-outline6">
      <style:paragraph-properties fo:margin-top="0.1cm" fo:margin-bottom="0cm"/>
      <style:text-properties fo:font-size="20pt" style:font-size-asian="20pt" style:font-size-complex="20pt"/>
    </style:style>
    <style:style style:name="Comparison-outline8" style:family="presentation" style:parent-style-name="Comparison-outline7">
      <style:paragraph-properties fo:margin-top="0.1cm" fo:margin-bottom="0cm"/>
      <style:text-properties fo:font-size="20pt" style:font-size-asian="20pt" style:font-size-complex="20pt"/>
    </style:style>
    <style:style style:name="Comparison-outline9" style:family="presentation" style:parent-style-name="Comparison-outline8">
      <style:paragraph-properties fo:margin-top="0.1cm" fo:margin-bottom="0cm"/>
      <style:text-properties fo:font-size="20pt" style:font-size-asian="20pt" style:font-size-complex="20pt"/>
    </style:style>
    <style:style style:name="Comparison-subtitle" style:family="presentation">
      <style:graphic-properties draw:stroke="none" draw:fill="none" draw:textarea-vertical-align="middle">
        <text:list-style style:name="Comparis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Unifont" style:font-family-asian="Unifont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mparison-title" style:family="presentation">
      <style:graphic-properties draw:stroke="none" draw:fill="none" draw:textarea-vertical-align="middle" style:writing-mode="lr-tb">
        <text:list-style style:name="Comparis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Unifont" style:font-family-asian="Unifont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Unifont" style:font-family-asian="Unifont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false" style:shrink-to-fit="true" style:writing-mode="lr-tb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Unifont" style:font-family-asian="Unifont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outline2" style:display-name="Title Only-outline2" style:family="presentation" style:parent-style-name="Title_20_Only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3" style:display-name="Title Only-outline3" style:family="presentation" style:parent-style-name="Title_20_Only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4" style:display-name="Title Only-outline4" style:family="presentation" style:parent-style-name="Title_20_Only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Unifont" style:font-family-asian="Unifont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 style:writing-mode="lr-tb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Unifont" style:font-family-asian="Unifont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Unifont" style:font-family-asian="Unifont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 style:writing-mode="lr-tb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Unifont" style:font-family-asian="Unifont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outline2" style:family="presentation" style:parent-style-name="Blank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Blank-outline3" style:family="presentation" style:parent-style-name="Blank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Blank-outline4" style:family="presentation" style:parent-style-name="Blank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Unifont" style:font-family-asian="Unifont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 style:writing-mode="lr-tb">
        <text:list-style style:name="Blank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Unifont" style:font-family-asian="Unifont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background" style:display-name="Content with Caption-background" style:family="presentation">
      <style:graphic-properties draw:stroke="none" draw:fill="solid" draw:fill-color="#ffffff"/>
      <style:text-properties style:letter-kerning="true"/>
    </style:style>
    <style:style style:name="Content_20_with_20_Caption-backgroundobjects" style:display-name="Content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_20_with_20_Caption-notes" style:display-name="Content with Caption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Unifont" style:font-family-asian="Unifont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_20_with_20_Caption-outline1" style:display-name="Content with Caption-outline1" style:family="presentation">
      <style:graphic-properties draw:stroke="none" draw:fill="none" draw:auto-grow-height="false" draw:fit-to-size="false" style:shrink-to-fit="true" style:writing-mode="lr-tb">
        <text:list-style style:name="Content_20_with_20_Caption-outline1" style:display-name="Content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Unifont" style:font-family-asian="Unifont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outline2" style:display-name="Content with Caption-outline2" style:family="presentation" style:parent-style-name="Content_20_with_20_Capti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3" style:display-name="Content with Caption-outline3" style:family="presentation" style:parent-style-name="Content_20_with_20_Capti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4" style:display-name="Content with Caption-outline4" style:family="presentation" style:parent-style-name="Content_20_with_20_Capti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5" style:display-name="Content with Caption-outline5" style:family="presentation" style:parent-style-name="Content_20_with_20_Caption-outline4">
      <style:paragraph-properties fo:margin-top="0.1cm" fo:margin-bottom="0cm"/>
      <style:text-properties fo:font-size="20pt" style:font-size-asian="20pt" style:font-size-complex="20pt"/>
    </style:style>
    <style:style style:name="Content_20_with_20_Caption-outline6" style:display-name="Content with Caption-outline6" style:family="presentation" style:parent-style-name="Content_20_with_20_Caption-outline5">
      <style:paragraph-properties fo:margin-top="0.1cm" fo:margin-bottom="0cm"/>
      <style:text-properties fo:font-size="20pt" style:font-size-asian="20pt" style:font-size-complex="20pt"/>
    </style:style>
    <style:style style:name="Content_20_with_20_Caption-outline7" style:display-name="Content with Caption-outline7" style:family="presentation" style:parent-style-name="Content_20_with_20_Caption-outline6">
      <style:paragraph-properties fo:margin-top="0.1cm" fo:margin-bottom="0cm"/>
      <style:text-properties fo:font-size="20pt" style:font-size-asian="20pt" style:font-size-complex="20pt"/>
    </style:style>
    <style:style style:name="Content_20_with_20_Caption-outline8" style:display-name="Content with Caption-outline8" style:family="presentation" style:parent-style-name="Content_20_with_20_Caption-outline7">
      <style:paragraph-properties fo:margin-top="0.1cm" fo:margin-bottom="0cm"/>
      <style:text-properties fo:font-size="20pt" style:font-size-asian="20pt" style:font-size-complex="20pt"/>
    </style:style>
    <style:style style:name="Content_20_with_20_Caption-outline9" style:display-name="Content with Caption-outline9" style:family="presentation" style:parent-style-name="Content_20_with_20_Caption-outline8">
      <style:paragraph-properties fo:margin-top="0.1cm" fo:margin-bottom="0cm"/>
      <style:text-properties fo:font-size="20pt" style:font-size-asian="20pt" style:font-size-complex="20pt"/>
    </style:style>
    <style:style style:name="Content_20_with_20_Caption-subtitle" style:display-name="Content with Caption-subtitle" style:family="presentation">
      <style:graphic-properties draw:stroke="none" draw:fill="none" draw:textarea-vertical-align="middle">
        <text:list-style style:name="Content_20_with_20_Caption-subtitle" style:display-name="Content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Unifont" style:font-family-asian="Unifont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20_with_20_Caption-title" style:display-name="Content with Caption-title" style:family="presentation">
      <style:graphic-properties draw:stroke="none" draw:fill="none" draw:textarea-vertical-align="middle" style:writing-mode="lr-tb">
        <text:list-style style:name="Content_20_with_20_Caption-title" style:display-name="Content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Unifont" style:font-family-asian="Unifont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background" style:display-name="Picture with Caption-background" style:family="presentation">
      <style:graphic-properties draw:stroke="none" draw:fill="solid" draw:fill-color="#ffffff"/>
      <style:text-properties style:letter-kerning="true"/>
    </style:style>
    <style:style style:name="Picture_20_with_20_Caption-backgroundobjects" style:display-name="Picture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icture_20_with_20_Caption-notes" style:display-name="Picture with Caption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Unifont" style:font-family-asian="Unifont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icture_20_with_20_Caption-outline1" style:display-name="Picture with Caption-outline1" style:family="presentation">
      <style:graphic-properties draw:stroke="none" draw:fill="none" draw:auto-grow-height="false" draw:fit-to-size="false" style:shrink-to-fit="true" style:writing-mode="lr-tb">
        <text:list-style style:name="Picture_20_with_20_Caption-outline1" style:display-name="Picture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Unifont" style:font-family-asian="Unifont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outline2" style:display-name="Picture with Caption-outline2" style:family="presentation" style:parent-style-name="Picture_20_with_20_Capti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3" style:display-name="Picture with Caption-outline3" style:family="presentation" style:parent-style-name="Picture_20_with_20_Capti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4" style:display-name="Picture with Caption-outline4" style:family="presentation" style:parent-style-name="Picture_20_with_20_Capti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5" style:display-name="Picture with Caption-outline5" style:family="presentation" style:parent-style-name="Picture_20_with_20_Caption-outline4">
      <style:paragraph-properties fo:margin-top="0.1cm" fo:margin-bottom="0cm"/>
      <style:text-properties fo:font-size="20pt" style:font-size-asian="20pt" style:font-size-complex="20pt"/>
    </style:style>
    <style:style style:name="Picture_20_with_20_Caption-outline6" style:display-name="Picture with Caption-outline6" style:family="presentation" style:parent-style-name="Picture_20_with_20_Caption-outline5">
      <style:paragraph-properties fo:margin-top="0.1cm" fo:margin-bottom="0cm"/>
      <style:text-properties fo:font-size="20pt" style:font-size-asian="20pt" style:font-size-complex="20pt"/>
    </style:style>
    <style:style style:name="Picture_20_with_20_Caption-outline7" style:display-name="Picture with Caption-outline7" style:family="presentation" style:parent-style-name="Picture_20_with_20_Caption-outline6">
      <style:paragraph-properties fo:margin-top="0.1cm" fo:margin-bottom="0cm"/>
      <style:text-properties fo:font-size="20pt" style:font-size-asian="20pt" style:font-size-complex="20pt"/>
    </style:style>
    <style:style style:name="Picture_20_with_20_Caption-outline8" style:display-name="Picture with Caption-outline8" style:family="presentation" style:parent-style-name="Picture_20_with_20_Caption-outline7">
      <style:paragraph-properties fo:margin-top="0.1cm" fo:margin-bottom="0cm"/>
      <style:text-properties fo:font-size="20pt" style:font-size-asian="20pt" style:font-size-complex="20pt"/>
    </style:style>
    <style:style style:name="Picture_20_with_20_Caption-outline9" style:display-name="Picture with Caption-outline9" style:family="presentation" style:parent-style-name="Picture_20_with_20_Caption-outline8">
      <style:paragraph-properties fo:margin-top="0.1cm" fo:margin-bottom="0cm"/>
      <style:text-properties fo:font-size="20pt" style:font-size-asian="20pt" style:font-size-complex="20pt"/>
    </style:style>
    <style:style style:name="Picture_20_with_20_Caption-subtitle" style:display-name="Picture with Caption-subtitle" style:family="presentation">
      <style:graphic-properties draw:stroke="none" draw:fill="none" draw:textarea-vertical-align="middle">
        <text:list-style style:name="Picture_20_with_20_Caption-subtitle" style:display-name="Picture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Unifont" style:font-family-asian="Unifont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icture_20_with_20_Caption-title" style:display-name="Picture with Caption-title" style:family="presentation">
      <style:graphic-properties draw:stroke="none" draw:fill="none" draw:textarea-vertical-align="middle" style:writing-mode="lr-tb">
        <text:list-style style:name="Picture_20_with_20_Caption-title" style:display-name="Picture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Unifont" style:font-family-asian="Unifont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6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Title_20_Slide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Title_20_Slid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Title_20_and_20_Vertical_20_Tex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6" style:family="presentation" style:parent-style-name="Title_20_and_20_Vertical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11.049cm" fo:padding-top="0.254cm" fo:padding-bottom="0.254cm" fo:padding-left="0.127cm" fo:padding-right="0.127cm" fo:wrap-option="wrap" loext:decorative="false"/>
      <style:paragraph-properties style:writing-mode="tb-rl"/>
    </style:style>
    <style:style style:name="Mpr7" style:family="presentation" style:parent-style-name="Title_20_and_20_Vertical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8" style:family="presentation" style:parent-style-name="Title_20_and_20_Vertical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Title_20_and_20_Vertical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Vertical_20_Title_20_and_20_Text-title">
      <style:graphic-properties draw:stroke="none" svg:stroke-width="0cm" draw:fill="none" loext:fill-use-slide-background="false" draw:textarea-horizontal-align="center" draw:textarea-vertical-align="top" draw:auto-grow-height="false" draw:auto-grow-width="false" draw:fit-to-size="false" style:shrink-to-fit="false" fo:min-height="3.181cm" fo:padding-top="0.254cm" fo:padding-bottom="0.254cm" fo:padding-left="0.127cm" fo:padding-right="0.127cm" fo:wrap-option="wrap" loext:decorative="false"/>
      <style:paragraph-properties style:writing-mode="tb-rl"/>
    </style:style>
    <style:style style:name="Mpr11" style:family="presentation" style:parent-style-name="Vertical_20_Title_20_and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11.049cm" fo:padding-top="0.254cm" fo:padding-bottom="0.254cm" fo:padding-left="0.127cm" fo:padding-right="0.127cm" fo:wrap-option="wrap" loext:decorative="false"/>
      <style:paragraph-properties style:writing-mode="tb-rl"/>
    </style:style>
    <style:style style:name="Mpr12" style:family="presentation" style:parent-style-name="Vertical_20_Title_20_and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3" style:family="presentation" style:parent-style-name="Vertical_20_Title_20_and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4" style:family="presentation" style:parent-style-name="Vertical_20_Title_20_and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5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16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7" style:family="presentation" style:parent-style-name="Title_20_and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8" style:family="presentation" style:parent-style-name="Title_20_and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9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0" style:family="presentation" style:parent-style-name="Section_20_Header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1" style:family="presentation" style:parent-style-name="Section_20_Header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2" style:family="presentation" style:parent-style-name="Section_20_Heade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3" style:family="presentation" style:parent-style-name="Section_20_Header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4" style:family="presentation" style:parent-style-name="Section_20_Header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5" style:family="presentation" style:parent-style-name="Two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6" style:family="presentation" style:parent-style-name="Two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7" style:family="presentation" style:parent-style-name="Two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8" style:family="presentation" style:parent-style-name="Two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9" style:family="presentation" style:parent-style-name="Two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0" style:family="presentation" style:parent-style-name="Comparison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31" style:family="presentation" style:parent-style-name="Comparison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2" style:family="presentation" style:parent-style-name="Comparis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3" style:family="presentation" style:parent-style-name="Comparis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4" style:family="presentation" style:parent-style-name="Comparis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5" style:family="presentation" style:parent-style-name="Comparis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6" style:family="presentation" style:parent-style-name="Title_20_Only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37" style:family="presentation" style:parent-style-name="Title_20_Onl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8" style:family="presentation" style:parent-style-name="Title_20_Onl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9" style:family="presentation" style:parent-style-name="Title_20_Onl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0" style:family="presentation" style:parent-style-name="Blank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1" style:family="presentation" style:parent-style-name="Blank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2" style:family="presentation" style:parent-style-name="Blank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3" style:family="presentation" style:parent-style-name="Content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44" style:family="presentation" style:parent-style-name="Content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5" style:family="presentation" style:parent-style-name="Content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6" style:family="presentation" style:parent-style-name="Content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7" style:family="presentation" style:parent-style-name="Content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8" style:family="presentation" style:parent-style-name="Picture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49" style:family="presentation" style:parent-style-name="Picture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50" style:family="presentation" style:parent-style-name="Picture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51" style:family="presentation" style:parent-style-name="Picture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2" style:family="presentation" style:parent-style-name="Picture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center" fo:text-indent="0cm" style:punctuation-wrap="hanging" loext:tab-stop-distance="1.27cm" style:writing-mode="lr-tb">
        <style:tab-stops/>
      </style:paragraph-properties>
      <style:text-properties fo:font-size="44pt"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14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text-align="center"/>
      <style:text-properties fo:font-size="14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loext:tab-stop-distance="1.27cm" style:writing-mode="lr-tb">
        <style:tab-stops/>
      </style:paragraph-properties>
      <style:text-properties fo:font-size="14pt" style:font-size-asian="14pt" style:font-size-complex="14pt" fo:hyphenate="false"/>
    </style:style>
    <style:style style:name="MP11" style:family="paragraph">
      <style:paragraph-properties fo:margin-left="0cm" fo:margin-right="0cm" fo:margin-top="0.226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32pt" fo:hyphenate="false"/>
    </style:style>
    <style:style style:name="MP12" style:family="paragraph">
      <style:paragraph-properties fo:margin-left="0cm" fo:margin-right="0cm" fo:margin-top="0.198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32pt" fo:hyphenate="false"/>
    </style:style>
    <style:style style:name="MP13" style:family="paragraph">
      <style:paragraph-properties fo:margin-left="0cm" fo:margin-right="0cm" fo:margin-top="0.169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32pt" fo:hyphenate="false"/>
    </style:style>
    <style:style style:name="MP14" style:family="paragraph">
      <style:paragraph-properties fo:margin-left="0cm" fo:margin-right="0cm" fo:margin-top="0.141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32pt"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16" style:family="paragraph">
      <style:paragraph-properties fo:margin-left="0cm" fo:margin-right="0cm" fo:margin-top="0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40pt"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18" style:family="paragraph">
      <style:paragraph-properties fo:margin-left="0cm" fo:margin-right="0cm" fo:margin-top="0.141cm" fo:margin-bottom="0cm" fo:line-height="100%" fo:text-align="start" fo:text-indent="0cm" style:punctuation-wrap="hanging" loext:tab-stop-distance="1.27cm" style:writing-mode="lr-tb">
        <style:tab-stops>
          <style:tab-stop style:position="0cm"/>
        </style:tab-stops>
      </style:paragraph-properties>
      <style:text-properties fo:font-size="20pt" fo:hyphenate="false"/>
    </style:style>
    <style:style style:name="MP19" style:family="paragraph">
      <loext:graphic-properties draw:fill="none"/>
      <style:paragraph-properties fo:text-align="start" style:font-independent-line-spacing="true"/>
      <style:text-properties fo:font-size="20pt"/>
    </style:style>
    <style:style style:name="MP20" style:family="paragraph">
      <style:paragraph-properties fo:margin-left="0cm" fo:margin-right="0cm" fo:margin-top="0.198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28pt" fo:hyphenate="false"/>
    </style:style>
    <style:style style:name="MP21" style:family="paragraph">
      <style:paragraph-properties fo:margin-left="0cm" fo:margin-right="0cm" fo:margin-top="0.169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28pt" fo:hyphenate="false"/>
    </style:style>
    <style:style style:name="MP22" style:family="paragraph">
      <style:paragraph-properties fo:margin-left="0cm" fo:margin-right="0cm" fo:margin-top="0.141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28pt" fo:hyphenate="false"/>
    </style:style>
    <style:style style:name="MP23" style:family="paragraph">
      <style:paragraph-properties fo:margin-left="0cm" fo:margin-right="0cm" fo:margin-top="0.127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28pt" fo:hyphenate="false"/>
    </style:style>
    <style:style style:name="MP24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25" style:family="paragraph">
      <style:paragraph-properties fo:margin-left="0cm" fo:margin-right="0cm" fo:margin-top="0.169cm" fo:margin-bottom="0cm" fo:line-height="100%" fo:text-align="start" fo:text-indent="0cm" style:punctuation-wrap="hanging" loext:tab-stop-distance="1.27cm" style:writing-mode="lr-tb">
        <style:tab-stops>
          <style:tab-stop style:position="0cm"/>
        </style:tab-stops>
      </style:paragraph-properties>
      <style:text-properties fo:font-size="24pt" fo:hyphenate="false"/>
    </style:style>
    <style:style style:name="MP26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27" style:family="paragraph">
      <style:paragraph-properties fo:margin-left="0cm" fo:margin-right="0cm" fo:margin-top="0.169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24pt" fo:hyphenate="false"/>
    </style:style>
    <style:style style:name="MP28" style:family="paragraph">
      <style:paragraph-properties fo:margin-left="0cm" fo:margin-right="0cm" fo:margin-top="0.141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24pt" fo:hyphenate="false"/>
    </style:style>
    <style:style style:name="MP29" style:family="paragraph">
      <style:paragraph-properties fo:margin-left="0cm" fo:margin-right="0cm" fo:margin-top="0.127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24pt" fo:hyphenate="false"/>
    </style:style>
    <style:style style:name="MP30" style:family="paragraph">
      <style:paragraph-properties fo:margin-left="0cm" fo:margin-right="0cm" fo:margin-top="0.113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24pt" fo:hyphenate="false"/>
    </style:style>
    <style:style style:name="MP31" style:family="paragraph">
      <style:paragraph-properties fo:margin-left="0cm" fo:margin-right="0cm" fo:margin-top="0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20pt" fo:hyphenate="false"/>
    </style:style>
    <style:style style:name="MP32" style:family="paragraph">
      <style:paragraph-properties fo:margin-left="0cm" fo:margin-right="0cm" fo:margin-top="0.099cm" fo:margin-bottom="0cm" fo:line-height="100%" fo:text-align="start" fo:text-indent="0cm" style:punctuation-wrap="hanging" loext:tab-stop-distance="1.27cm" style:writing-mode="lr-tb">
        <style:tab-stops>
          <style:tab-stop style:position="0cm"/>
        </style:tab-stops>
      </style:paragraph-properties>
      <style:text-properties fo:font-size="14pt" fo:hyphenate="false"/>
    </style:style>
    <style:style style:name="MP33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44pt" fo:letter-spacing="normal" fo:language="en" fo:country="US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>
        <loext:char-complex-color loext:theme-type="dark1" loext:color-type="theme"/>
      </style:text-properties>
    </style:style>
    <style:style style:name="MT2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2pt" fo:letter-spacing="normal" fo:language="en" fo:country="US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>
        <loext:char-complex-color loext:theme-type="dark1" loext:color-type="theme"/>
      </style:text-properties>
    </style:style>
    <style:style style:name="M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>
        <loext:char-complex-color loext:theme-type="dark1" loext:color-type="theme"/>
      </style:text-properties>
    </style:style>
    <style:style style:name="M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M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MT7" style:family="text">
      <style:text-properties fo:text-transform="uppercase" fo:color="#000000" loext:opacity="100%" style:text-outline="false" style:text-line-through-style="none" style:text-line-through-type="none" style:text-position="0% 100%" style:font-name="Calibri" fo:font-size="40pt" fo:letter-spacing="normal" fo:language="en" fo:country="US" fo:font-style="normal" style:text-underline-style="none" fo:font-weight="bold" fo:background-color="transparent" style:font-size-asian="40pt" style:font-style-asian="normal" style:font-weight-asian="bold" style:font-size-complex="40pt" style:font-style-complex="normal" style:font-weight-complex="bold">
        <loext:char-complex-color loext:theme-type="dark1" loext:color-type="theme"/>
      </style:text-properties>
    </style:style>
    <style:style style:name="MT8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M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M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6pt" fo:letter-spacing="normal" fo:language="en" fo:country="US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>
        <loext:char-complex-color loext:theme-type="dark1" loext:color-type="theme"/>
      </style:text-properties>
    </style:style>
    <style:style style:name="M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bold" fo:background-color="transparent" style:font-size-asian="20pt" style:font-style-asian="normal" style:font-weight-asian="bold" style:font-size-complex="20pt" style:font-style-complex="normal" style:font-weight-complex="bold">
        <loext:char-complex-color loext:theme-type="dark1" loext:color-type="theme"/>
      </style:text-properties>
    </style:style>
    <style:style style:name="M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4pt" fo:letter-spacing="normal" fo:language="en" fo:country="US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>
        <loext:char-complex-color loext:theme-type="dark1" loext:color-type="theme"/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fo:font-family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fo:font-family="Aria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fo:font-family="Aria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fo:font-family="Aria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0">
      <text:list-level-style-number text:level="1" style:num-format="">
        <style:list-level-properties text:space-before="0.3cm" text:min-label-width="0.9cm"/>
        <style:text-properties fo:color="#8b8b8b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1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Foliennummer&gt;</text:page-number></text:p>
        </draw:text-box>
      </draw:frame>
    </style:handout-master>
    <style:master-page style:name="Title_20_Slide" style:display-name="Title Slide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1" draw:text-style-name="MP6" draw:layer="backgroundobjects" svg:width="21.589cm" svg:height="4.082cm" svg:x="1.905cm" svg:y="5.918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Date Placeholder 3" presentation:style-name="Mpr2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2" draw:text-style-name="MP8" draw:layer="backgroundobjects" svg:width="8.042cm" svg:height="1.013cm" svg:x="8.678cm" svg:y="17.657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2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2"><text:page-number>&lt;Foliennummer&gt;</text:page-number></text:span></text:p>
        </draw:text-box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Foliennummer&gt;</text:page-number></text:p>
          </draw:text-box>
        </draw:frame>
      </presentation:notes>
    </style:master-page>
    <style:master-page style:name="Title_20_and_20_Vertical_20_Text" style:display-name="Title and Vertical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5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Vertical Text Placeholder 2" presentation:style-name="Mpr6" draw:text-style-name="MP15" draw:layer="backgroundobjects" svg:width="22.859cm" svg:height="12.571cm" svg:x="1.27cm" svg:y="4.445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7" draw:text-style-name="MP8" draw:layer="backgroundobjects" svg:width="8.042cm" svg:height="1.013cm" svg:x="8.678cm" svg:y="17.657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7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2"><text:page-number>&lt;Foliennummer&gt;</text:page-number></text:span></text:p>
        </draw:text-box>
      </draw:frame>
      <presentation:notes style:page-layout-name="PM0">
        <draw:page-thumbnail presentation:style-name="Title_20_and_20_Vertical_20_Text-title" draw:layer="backgroundobjects" svg:width="0cm" svg:height="0cm" svg:x="0cm" svg:y="2.257cm" presentation:class="page"/>
        <draw:frame presentation:style-name="Title_20_and_20_Vertical_20_Tex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page-number>&lt;Foliennummer&gt;</text:page-number></text:p>
          </draw:text-box>
        </draw:frame>
      </presentation:notes>
    </style:master-page>
    <style:master-page style:name="Vertical_20_Title_20_and_20_Text" style:display-name="Vertical Title and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Vertical Title 1" presentation:style-name="Mpr10" draw:text-style-name="MP6" draw:layer="backgroundobjects" svg:width="5.714cm" svg:height="16.253cm" svg:x="18.415cm" svg:y="0.763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Vertical Text Placeholder 2" presentation:style-name="Mpr11" draw:text-style-name="MP15" draw:layer="backgroundobjects" svg:width="16.721cm" svg:height="16.253cm" svg:x="1.27cm" svg:y="0.763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2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12" draw:text-style-name="MP8" draw:layer="backgroundobjects" svg:width="8.042cm" svg:height="1.013cm" svg:x="8.678cm" svg:y="17.657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12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2"><text:page-number>&lt;Foliennummer&gt;</text:page-number></text:span></text:p>
        </draw:text-box>
      </draw:frame>
      <presentation:notes style:page-layout-name="PM0">
        <draw:page-thumbnail presentation:style-name="Vertical_20_Title_20_and_20_Text-title" draw:layer="backgroundobjects" svg:width="0cm" svg:height="0cm" svg:x="0cm" svg:y="2.257cm" presentation:class="page"/>
        <draw:frame presentation:style-name="Vertical_20_Title_20_and_20_Text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page-number>&lt;Foliennummer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15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Content Placeholder 2" presentation:style-name="Mpr16" draw:text-style-name="MP15" draw:layer="backgroundobjects" svg:width="22.859cm" svg:height="12.571cm" svg:x="1.27cm" svg:y="4.445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7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17" draw:text-style-name="MP8" draw:layer="backgroundobjects" svg:width="8.042cm" svg:height="1.013cm" svg:x="8.678cm" svg:y="17.657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17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2"><text:page-number>&lt;Foliennummer&gt;</text:page-number></text:span></text:p>
        </draw:text-box>
      </draw:frame>
      <presentation:notes style:page-layout-name="PM0">
        <draw:page-thumbnail presentation:style-name="Title_20_and_20_Content-title" draw:layer="backgroundobjects" svg:width="0cm" svg:height="0cm" svg:x="0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page-number>&lt;Foliennummer&gt;</text:page-number></text:p>
          </draw:text-box>
        </draw:frame>
      </presentation:notes>
    </style:master-page>
    <style:master-page style:name="Section_20_Header" style:display-name="Section Header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20" draw:text-style-name="MP17" draw:layer="backgroundobjects" svg:width="21.589cm" svg:height="3.783cm" svg:x="2.006cm" svg:y="12.241cm" presentation:class="title" presentation:user-transformed="true">
        <draw:text-box>
          <text:p text:style-name="MP16"><text:span text:style-name="MT7">Click to edit Master title style</text:span></text:p>
        </draw:text-box>
      </draw:frame>
      <draw:frame draw:name="Text Placeholder 2" presentation:style-name="Mpr21" draw:text-style-name="MP19" draw:layer="backgroundobjects" svg:width="21.589cm" svg:height="4.166cm" svg:x="2.006cm" svg:y="8.074cm" presentation:class="outline" presentation:user-transformed="true">
        <draw:text-box>
          <text:p text:style-name="MP18"><text:span text:style-name="MT8">Click to edit Master text styles</text:span></text:p>
        </draw:text-box>
      </draw:frame>
      <draw:frame draw:name="Date Placeholder 3" presentation:style-name="Mpr22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22" draw:text-style-name="MP8" draw:layer="backgroundobjects" svg:width="8.042cm" svg:height="1.013cm" svg:x="8.678cm" svg:y="17.657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22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2"><text:page-number>&lt;Foliennummer&gt;</text:page-number></text:span></text:p>
        </draw:text-box>
      </draw:frame>
      <presentation:notes style:page-layout-name="PM0">
        <draw:page-thumbnail presentation:style-name="Section_20_Header-title" draw:layer="backgroundobjects" svg:width="0cm" svg:height="0cm" svg:x="0cm" svg:y="2.257cm" presentation:class="page"/>
        <draw:frame presentation:style-name="Section_20_Header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page-number>&lt;Foliennummer&gt;</text:page-number></text:p>
          </draw:text-box>
        </draw:frame>
      </presentation:notes>
    </style:master-page>
    <style:master-page style:name="Two_20_Content" style:display-name="Two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25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Content Placeholder 2" presentation:style-name="Mpr26" draw:text-style-name="MP24" draw:layer="backgroundobjects" svg:width="11.217cm" svg:height="12.571cm" svg:x="1.27cm" svg:y="4.445cm" presentation:class="outline" presentation:user-transformed="true">
        <draw:text-box>
          <text:list text:style-name="ML5">
            <text:list-item>
              <text:p text:style-name="MP20"><text:span text:style-name="MT4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1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2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3"><text:span text:style-name="MT9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3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26" draw:text-style-name="MP24" draw:layer="backgroundobjects" svg:width="11.217cm" svg:height="12.571cm" svg:x="12.912cm" svg:y="4.445cm" presentation:class="outline" presentation:user-transformed="true">
        <draw:text-box>
          <text:list text:style-name="ML5">
            <text:list-item>
              <text:p text:style-name="MP20"><text:span text:style-name="MT4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1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2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3"><text:span text:style-name="MT9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3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27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27" draw:text-style-name="MP8" draw:layer="backgroundobjects" svg:width="8.042cm" svg:height="1.013cm" svg:x="8.678cm" svg:y="17.657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27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2"><text:page-number>&lt;Foliennummer&gt;</text:page-number></text:span></text:p>
        </draw:text-box>
      </draw:frame>
      <presentation:notes style:page-layout-name="PM0">
        <draw:page-thumbnail presentation:style-name="Two_20_Content-title" draw:layer="backgroundobjects" svg:width="0cm" svg:height="0cm" svg:x="0cm" svg:y="2.257cm" presentation:class="page"/>
        <draw:frame presentation:style-name="Two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2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9" draw:text-style-name="MP4" draw:layer="backgroundobjects" svg:width="9.113cm" svg:height="1.484cm" svg:x="11.886cm" svg:y="28.215cm" presentation:class="page-number">
          <draw:text-box>
            <text:p text:style-name="MP3"><text:page-number>&lt;Foliennummer&gt;</text:page-number></text:p>
          </draw:text-box>
        </draw:frame>
      </presentation:notes>
    </style:master-page>
    <style:master-page style:name="Comparis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30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Text Placeholder 2" presentation:style-name="Mpr31" draw:text-style-name="MP26" draw:layer="backgroundobjects" svg:width="11.222cm" svg:height="1.776cm" svg:x="1.27cm" svg:y="4.264cm" presentation:class="outline" presentation:user-transformed="true">
        <draw:text-box>
          <text:p text:style-name="MP25"><text:span text:style-name="MT10">Click to edit Master text styles</text:span></text:p>
        </draw:text-box>
      </draw:frame>
      <draw:frame draw:name="Content Placeholder 3" presentation:style-name="Mpr32" draw:text-style-name="MP26" draw:layer="backgroundobjects" svg:width="11.222cm" svg:height="10.975cm" svg:x="1.27cm" svg:y="6.041cm" presentation:class="outline" presentation:user-transformed="true">
        <draw:text-box>
          <text:list text:style-name="ML5">
            <text:list-item>
              <text:p text:style-name="MP27"><text:span text:style-name="MT5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8"><text:span text:style-name="MT6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9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30"><text:span text:style-name="MT11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30"><text:span text:style-name="MT11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31" draw:text-style-name="MP26" draw:layer="backgroundobjects" svg:width="11.226cm" svg:height="1.776cm" svg:x="12.903cm" svg:y="4.264cm" presentation:class="outline" presentation:user-transformed="true">
        <draw:text-box>
          <text:p text:style-name="MP25"><text:span text:style-name="MT10">Click to edit Master text styles</text:span></text:p>
        </draw:text-box>
      </draw:frame>
      <draw:frame draw:name="Content Placeholder 5" presentation:style-name="Mpr32" draw:text-style-name="MP26" draw:layer="backgroundobjects" svg:width="11.226cm" svg:height="10.975cm" svg:x="12.903cm" svg:y="6.041cm" presentation:class="outline" presentation:user-transformed="true">
        <draw:text-box>
          <text:list text:style-name="ML5">
            <text:list-item>
              <text:p text:style-name="MP27"><text:span text:style-name="MT5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8"><text:span text:style-name="MT6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9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30"><text:span text:style-name="MT11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30"><text:span text:style-name="MT11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33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7" presentation:style-name="Mpr33" draw:text-style-name="MP8" draw:layer="backgroundobjects" svg:width="8.042cm" svg:height="1.013cm" svg:x="8.678cm" svg:y="17.657cm" presentation:class="footer" presentation:user-transformed="true">
        <draw:text-box>
          <text:p text:style-name="MP9"><presentation:footer/></text:p>
        </draw:text-box>
      </draw:frame>
      <draw:frame draw:name="Slide Number Placeholder 8" presentation:style-name="Mpr33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2"><text:page-number>&lt;Foliennummer&gt;</text:page-number></text:span></text:p>
        </draw:text-box>
      </draw:frame>
      <presentation:notes style:page-layout-name="PM0">
        <draw:page-thumbnail presentation:style-name="Comparison-title" draw:layer="backgroundobjects" svg:width="0cm" svg:height="0cm" svg:x="0cm" svg:y="2.257cm" presentation:class="page"/>
        <draw:frame presentation:style-name="Comparison-notes" draw:layer="backgroundobjects" svg:width="16.799cm" svg:height="13.364cm" svg:x="2.1cm" svg:y="14.107cm" presentation:class="notes" presentation:placeholder="true">
          <draw:text-box/>
        </draw:frame>
        <draw:frame presentation:style-name="Mpr34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4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5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5" draw:text-style-name="MP4" draw:layer="backgroundobjects" svg:width="9.113cm" svg:height="1.484cm" svg:x="11.886cm" svg:y="28.215cm" presentation:class="page-number">
          <draw:text-box>
            <text:p text:style-name="MP3"><text:page-number>&lt;Foliennummer&gt;</text:page-number></text:p>
          </draw:text-box>
        </draw:frame>
      </presentation:notes>
    </style:master-page>
    <style:master-page style:name="Title_20_Only" style:display-name="Title Only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36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Date Placeholder 2" presentation:style-name="Mpr37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3" presentation:style-name="Mpr37" draw:text-style-name="MP8" draw:layer="backgroundobjects" svg:width="8.042cm" svg:height="1.013cm" svg:x="8.678cm" svg:y="17.657cm" presentation:class="footer" presentation:user-transformed="true">
        <draw:text-box>
          <text:p text:style-name="MP9"><presentation:footer/></text:p>
        </draw:text-box>
      </draw:frame>
      <draw:frame draw:name="Slide Number Placeholder 4" presentation:style-name="Mpr37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2"><text:page-number>&lt;Foliennummer&gt;</text:page-number></text:span></text:p>
        </draw:text-box>
      </draw:frame>
      <presentation:notes style:page-layout-name="PM0">
        <draw:page-thumbnail presentation:style-name="Title_20_Only-title" draw:layer="backgroundobjects" svg:width="0cm" svg:height="0cm" svg:x="0cm" svg:y="2.257cm" presentation:class="page"/>
        <draw:frame presentation:style-name="Title_20_Only-notes" draw:layer="backgroundobjects" svg:width="16.799cm" svg:height="13.364cm" svg:x="2.1cm" svg:y="14.107cm" presentation:class="notes" presentation:placeholder="true">
          <draw:text-box/>
        </draw:frame>
        <draw:frame presentation:style-name="Mpr3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9" draw:text-style-name="MP4" draw:layer="backgroundobjects" svg:width="9.113cm" svg:height="1.484cm" svg:x="11.886cm" svg:y="28.215cm" presentation:class="page-number">
          <draw:text-box>
            <text:p text:style-name="MP3"><text:page-number>&lt;Foliennummer&gt;</text:page-number></text:p>
          </draw:text-box>
        </draw:frame>
      </presentation:notes>
    </style:master-page>
    <style:master-page style:name="Blank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Date Placeholder 1" presentation:style-name="Mpr40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2" presentation:style-name="Mpr40" draw:text-style-name="MP8" draw:layer="backgroundobjects" svg:width="8.042cm" svg:height="1.013cm" svg:x="8.678cm" svg:y="17.657cm" presentation:class="footer" presentation:user-transformed="true">
        <draw:text-box>
          <text:p text:style-name="MP9"><presentation:footer/></text:p>
        </draw:text-box>
      </draw:frame>
      <draw:frame draw:name="Slide Number Placeholder 3" presentation:style-name="Mpr40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2"><text:page-number>&lt;Foliennummer&gt;</text:page-number></text:span></text:p>
        </draw:text-box>
      </draw:frame>
      <draw:frame presentation:style-name="Blank-title" draw:layer="backgroundobjects" svg:width="30.478cm" svg:height="3.18cm" svg:x="1.693cm" svg:y="0.76cm" presentation:class="title" presentation:placeholder="true">
        <draw:text-box/>
      </draw:frame>
      <draw:frame presentation:style-name="Blank-outline1" draw:layer="backgroundobjects" svg:width="30.478cm" svg:height="11.048cm" svg:x="1.693cm" svg:y="4.457cm" presentation:class="outline" presentation:placeholder="true">
        <draw:text-box/>
      </draw:frame>
      <presentation:notes style:page-layout-name="PM0">
        <draw:page-thumbnail presentation:style-name="Blank-title" draw:layer="backgroundobjects" svg:width="0cm" svg:height="0cm" svg:x="0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4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2" draw:text-style-name="MP4" draw:layer="backgroundobjects" svg:width="9.113cm" svg:height="1.484cm" svg:x="11.886cm" svg:y="28.215cm" presentation:class="page-number">
          <draw:text-box>
            <text:p text:style-name="MP3"><text:page-number>&lt;Foliennummer&gt;</text:page-number></text:p>
          </draw:text-box>
        </draw:frame>
      </presentation:notes>
    </style:master-page>
    <style:master-page style:name="Content_20_with_20_Caption" style:display-name="Content with Capti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43" draw:text-style-name="MP19" draw:layer="backgroundobjects" svg:width="8.355cm" svg:height="3.227cm" svg:x="1.27cm" svg:y="0.758cm" presentation:class="title" presentation:user-transformed="true">
        <draw:text-box>
          <text:p text:style-name="MP31"><text:span text:style-name="MT12">Click to edit Master title style</text:span></text:p>
        </draw:text-box>
      </draw:frame>
      <draw:frame draw:name="Content Placeholder 2" presentation:style-name="Mpr44" draw:text-style-name="MP15" draw:layer="backgroundobjects" svg:width="14.198cm" svg:height="16.258cm" svg:x="9.931cm" svg:y="0.758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3" presentation:style-name="Mpr44" draw:text-style-name="MP33" draw:layer="backgroundobjects" svg:width="8.355cm" svg:height="13.03cm" svg:x="1.27cm" svg:y="3.986cm" presentation:class="outline" presentation:user-transformed="true">
        <draw:text-box>
          <text:p text:style-name="MP32"><text:span text:style-name="MT13">Click to edit Master text styles</text:span></text:p>
        </draw:text-box>
      </draw:frame>
      <draw:frame draw:name="Date Placeholder 4" presentation:style-name="Mpr45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45" draw:text-style-name="MP8" draw:layer="backgroundobjects" svg:width="8.042cm" svg:height="1.013cm" svg:x="8.678cm" svg:y="17.657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45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2"><text:page-number>&lt;Foliennummer&gt;</text:page-number></text:span></text:p>
        </draw:text-box>
      </draw:frame>
      <presentation:notes style:page-layout-name="PM0">
        <draw:page-thumbnail presentation:style-name="Content_20_with_20_Caption-title" draw:layer="backgroundobjects" svg:width="0cm" svg:height="0cm" svg:x="0cm" svg:y="2.257cm" presentation:class="page"/>
        <draw:frame presentation:style-name="Content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46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6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7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7" draw:text-style-name="MP4" draw:layer="backgroundobjects" svg:width="9.113cm" svg:height="1.484cm" svg:x="11.886cm" svg:y="28.215cm" presentation:class="page-number">
          <draw:text-box>
            <text:p text:style-name="MP3"><text:page-number>&lt;Foliennummer&gt;</text:page-number></text:p>
          </draw:text-box>
        </draw:frame>
      </presentation:notes>
    </style:master-page>
    <style:master-page style:name="Picture_20_with_20_Caption" style:display-name="Picture with Capti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48" draw:text-style-name="MP19" draw:layer="backgroundobjects" svg:width="15.239cm" svg:height="1.573cm" svg:x="4.979cm" svg:y="13.335cm" presentation:class="title" presentation:user-transformed="true">
        <draw:text-box>
          <text:p text:style-name="MP31"><text:span text:style-name="MT12">Click to edit Master title style</text:span></text:p>
        </draw:text-box>
      </draw:frame>
      <draw:frame draw:name="Picture Placeholder 2" presentation:style-name="Picture_20_with_20_Caption-outline1" draw:layer="backgroundobjects" svg:width="15.239cm" svg:height="11.429cm" svg:x="4.979cm" svg:y="1.702cm" presentation:class="outline" presentation:placeholder="true" presentation:user-transformed="true">
        <draw:text-box/>
      </draw:frame>
      <draw:frame draw:name="Text Placeholder 3" presentation:style-name="Mpr49" draw:text-style-name="MP33" draw:layer="backgroundobjects" svg:width="15.239cm" svg:height="2.235cm" svg:x="4.979cm" svg:y="14.909cm" presentation:class="outline" presentation:user-transformed="true">
        <draw:text-box>
          <text:p text:style-name="MP32"><text:span text:style-name="MT13">Click to edit Master text styles</text:span></text:p>
        </draw:text-box>
      </draw:frame>
      <draw:frame draw:name="Date Placeholder 4" presentation:style-name="Mpr50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50" draw:text-style-name="MP8" draw:layer="backgroundobjects" svg:width="8.042cm" svg:height="1.013cm" svg:x="8.678cm" svg:y="17.657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50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2"><text:page-number>&lt;Foliennummer&gt;</text:page-number></text:span></text:p>
        </draw:text-box>
      </draw:frame>
      <presentation:notes style:page-layout-name="PM0">
        <draw:page-thumbnail presentation:style-name="Picture_20_with_20_Caption-title" draw:layer="backgroundobjects" svg:width="0cm" svg:height="0cm" svg:x="0cm" svg:y="2.257cm" presentation:class="page"/>
        <draw:frame presentation:style-name="Picture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5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5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2" draw:text-style-name="MP4" draw:layer="backgroundobjects" svg:width="9.113cm" svg:height="1.484cm" svg:x="11.886cm" svg:y="28.215cm" presentation:class="page-number">
          <draw:text-box>
            <text:p text:style-name="MP3"><text:page-number>&lt;Folien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escription>generated using python-pptx</dc:description>
    <meta:editing-cycles>2</meta:editing-cycles>
    <meta:creation-date>2013-01-27T09:14:16</meta:creation-date>
    <dc:date>2026-07-19T19:43:34.941497682</dc:date>
    <meta:editing-duration>PT2M43S</meta:editing-duration>
    <meta:generator>LibreOffice/25.2.6.2$Linux_X86_64 LibreOffice_project/520$Build-2</meta:generator>
    <meta:document-statistic meta:object-count="290"/>
    <meta:user-defined meta:name="AppVersion">14.0000</meta:user-defined>
    <meta:user-defined meta:name="PresentationFormat">On-screen Show (4:3)</meta:user-defined>
  </office:meta>
</office:document-meta>
</file>